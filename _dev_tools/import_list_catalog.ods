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514cm"/>
    </style:style>
    <style:style style:name="co2" style:family="table-column">
      <style:table-column-properties fo:break-before="auto" style:column-width="1.097cm"/>
    </style:style>
    <style:style style:name="co3" style:family="table-column">
      <style:table-column-properties fo:break-before="auto" style:column-width="12.102cm"/>
    </style:style>
    <style:style style:name="co4" style:family="table-column">
      <style:table-column-properties fo:break-before="auto" style:column-width="14.337cm"/>
    </style:style>
    <style:style style:name="co5" style:family="table-column">
      <style:table-column-properties fo:break-before="auto" style:column-width="2.297cm"/>
    </style:style>
    <style:style style:name="co6" style:family="table-column">
      <style:table-column-properties fo:break-before="auto" style:column-width="24.661cm"/>
    </style:style>
    <style:style style:name="co7" style:family="table-column">
      <style:table-column-properties fo:break-before="auto" style:column-width="16.706cm"/>
    </style:style>
    <style:style style:name="co8" style:family="table-column">
      <style:table-column-properties fo:break-before="auto" style:column-width="2.432cm"/>
    </style:style>
    <style:style style:name="co9" style:family="table-column">
      <style:table-column-properties fo:break-before="auto" style:column-width="4.339cm"/>
    </style:style>
    <style:style style:name="co10" style:family="table-column">
      <style:table-column-properties fo:break-before="auto" style:column-width="4.939cm"/>
    </style:style>
    <style:style style:name="co11" style:family="table-column">
      <style:table-column-properties fo:break-before="auto" style:column-width="3.958cm"/>
    </style:style>
    <style:style style:name="co12" style:family="table-column">
      <style:table-column-properties fo:break-before="auto" style:column-width="13.137cm"/>
    </style:style>
    <style:style style:name="co13" style:family="table-column">
      <style:table-column-properties fo:break-before="auto" style:column-width="2.268cm"/>
    </style:style>
    <style:style style:name="co1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map style:condition="is-true-formula([.$M2]=&quot;Checked&quot;)" style:apply-style-name="Good" style:base-cell-address="import_list_catalog.A2"/>
    </style:style>
    <style:style style:name="ce2" style:family="table-cell" style:parent-style-name="Default" style:data-style-name="N100">
      <style:map style:condition="is-true-formula([.$M2]=&quot;Checked&quot;)" style:apply-style-name="Good" style:base-cell-address="import_list_catalog.A2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import_list_catalog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2"/>
        <table:table-column table:style-name="co6" table:default-cell-style-name="ce1"/>
        <table:table-column table:style-name="co7" table:default-cell-style-name="ce1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1"/>
        <table:table-column table:style-name="co13" table:default-cell-style-name="ce1"/>
        <table:table-row table:style-name="ro1">
          <table:table-cell table:style-name="Default" office:value-type="string" calcext:value-type="string">
            <text:p>registry_index</text:p>
          </table:table-cell>
          <table:table-cell table:style-name="Default" office:value-type="string" calcext:value-type="string">
            <text:p>order</text:p>
          </table:table-cell>
          <table:table-cell table:style-name="Default" office:value-type="string" calcext:value-type="string">
            <text:p>source_id</text:p>
          </table:table-cell>
          <table:table-cell table:style-name="Default" office:value-type="string" calcext:value-type="string">
            <text:p>name</text:p>
          </table:table-cell>
          <table:table-cell table:style-name="Default" office:value-type="string" calcext:value-type="string">
            <text:p>discontinued</text:p>
          </table:table-cell>
          <table:table-cell table:style-name="Default" office:value-type="string" calcext:value-type="string">
            <text:p>url</text:p>
          </table:table-cell>
          <table:table-cell table:style-name="Default" office:value-type="string" calcext:value-type="string">
            <text:p>filter_categories</text:p>
          </table:table-cell>
          <table:table-cell table:style-name="Default" office:value-type="string" calcext:value-type="string">
            <text:p>match_series</text:p>
          </table:table-cell>
          <table:table-cell table:style-name="Default" office:value-type="string" calcext:value-type="string">
            <text:p>requires_series_matching</text:p>
          </table:table-cell>
          <table:table-cell table:style-name="Default" office:value-type="string" calcext:value-type="string">
            <text:p>supports_incremental_update</text:p>
          </table:table-cell>
          <table:table-cell table:style-name="Default" office:value-type="string" calcext:value-type="string">
            <text:p>automatic_source_only</text:p>
          </table:table-cell>
          <table:table-cell table:style-name="Default" office:value-type="string" calcext:value-type="string">
            <text:p>source_choices</text:p>
          </table:table-cell>
          <table:table-cell table:style-name="Default" office:value-type="string" calcext:value-type="string">
            <text:p>Manual Test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act_book_of_the_year_award</text:p>
          </table:table-cell>
          <table:table-cell office:value-type="string" calcext:value-type="string">
            <text:p>ACT Book of the Year Awar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s://www.library.act.gov.au/find/history/frequentlyaskedquestions/Events/literaryawards/book_of_the_year</text:p>
          </table:table-cell>
          <table:table-cell office:value-type="string" calcext:value-type="string">
            <text:p>Regional &amp; National Awards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Automatic | Libraries ACT | Wikipedia</text:p>
          </table:table-cell>
          <table:table-cell office:value-type="string" calcext:value-type="string">
            <text:p>not_checked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agatha_award_best_novel</text:p>
          </table:table-cell>
          <table:table-cell office:value-type="string" calcext:value-type="string">
            <text:p>Agatha Award - Contemporary Nove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s://www.stopyourekillingme.com/Awards/Agatha_Awards.html</text:p>
          </table:table-cell>
          <table:table-cell office:value-type="string" calcext:value-type="string">
            <text:p>Crime, Mystery &amp; Thriller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Automatic | Stop, You're Killing Me | LibraryThing</text:p>
          </table:table-cell>
          <table:table-cell office:value-type="string" calcext:value-type="string">
            <text:p>not_checked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agatha_award_childrens_ya</text:p>
          </table:table-cell>
          <table:table-cell office:value-type="string" calcext:value-type="string">
            <text:p>Agatha Award - Children's/YA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s://www.stopyourekillingme.com/Awards/Agatha_Awards.html</text:p>
          </table:table-cell>
          <table:table-cell office:value-type="string" calcext:value-type="string">
            <text:p>Crime, Mystery &amp; Thriller | Young Adult &amp; Children's Literature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Automatic | Stop, You're Killing Me | LibraryThing</text:p>
          </table:table-cell>
          <table:table-cell office:value-type="string" calcext:value-type="string">
            <text:p>not_checked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agatha_award_first_novel</text:p>
          </table:table-cell>
          <table:table-cell office:value-type="string" calcext:value-type="string">
            <text:p>Agatha Award - Best First Nove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s://www.stopyourekillingme.com/Awards/Agatha_Awards.html</text:p>
          </table:table-cell>
          <table:table-cell office:value-type="string" calcext:value-type="string">
            <text:p>Crime, Mystery &amp; Thriller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Automatic | Stop, You're Killing Me | LibraryThing</text:p>
          </table:table-cell>
          <table:table-cell office:value-type="string" calcext:value-type="string">
            <text:p>not_checked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agatha_award_historical_novel</text:p>
          </table:table-cell>
          <table:table-cell office:value-type="string" calcext:value-type="string">
            <text:p>Agatha Award - Historical Nove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s://www.stopyourekillingme.com/Awards/Agatha_Awards.html</text:p>
          </table:table-cell>
          <table:table-cell office:value-type="string" calcext:value-type="string">
            <text:p>Crime, Mystery &amp; Thriller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Automatic | Stop, You're Killing Me | LibraryThing</text:p>
          </table:table-cell>
          <table:table-cell office:value-type="string" calcext:value-type="string">
            <text:p>not_checked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agatha_award_non_fiction</text:p>
          </table:table-cell>
          <table:table-cell office:value-type="string" calcext:value-type="string">
            <text:p>Agatha Award - Non-Fictio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s://www.stopyourekillingme.com/Awards/Agatha_Awards.html</text:p>
          </table:table-cell>
          <table:table-cell office:value-type="string" calcext:value-type="string">
            <text:p>Crime, Mystery &amp; Thriller | Nonfiction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Automatic | Stop, You're Killing Me | LibraryThing</text:p>
          </table:table-cell>
          <table:table-cell office:value-type="string" calcext:value-type="string">
            <text:p>not_checked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andrew_carnegie_medal_nonfiction</text:p>
          </table:table-cell>
          <table:table-cell office:value-type="string" calcext:value-type="string">
            <text:p>Andrew Carnegie Medal for Excellence in Nonfictio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s://www.ala.org/carnegie-medals/2026-winners</text:p>
          </table:table-cell>
          <table:table-cell office:value-type="string" calcext:value-type="string">
            <text:p>Nonfiction | Regional &amp; National Awards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not_checked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anthony_award_anthology_collection</text:p>
          </table:table-cell>
          <table:table-cell office:value-type="string" calcext:value-type="string">
            <text:p>Anthony Award - Anthology/Collectio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s://www.stopyourekillingme.com/Awards/Anthony_Awards.html</text:p>
          </table:table-cell>
          <table:table-cell office:value-type="string" calcext:value-type="string">
            <text:p>Crime, Mystery &amp; Thriller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Automatic | Stop, You're Killing Me | LibraryThing</text:p>
          </table:table-cell>
          <table:table-cell office:value-type="string" calcext:value-type="string">
            <text:p>not_checked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anthony_award_childrens_ya</text:p>
          </table:table-cell>
          <table:table-cell office:value-type="string" calcext:value-type="string">
            <text:p>Anthony Award - Children's/YA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s://www.stopyourekillingme.com/Awards/Anthony_Awards.html</text:p>
          </table:table-cell>
          <table:table-cell office:value-type="string" calcext:value-type="string">
            <text:p>Crime, Mystery &amp; Thriller | Young Adult &amp; Children's Literature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Automatic | Stop, You're Killing Me | LibraryThing</text:p>
          </table:table-cell>
          <table:table-cell office:value-type="string" calcext:value-type="string">
            <text:p>not_checked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anthony_award_cozy_humorous_mystery</text:p>
          </table:table-cell>
          <table:table-cell office:value-type="string" calcext:value-type="string">
            <text:p>Anthony Award - Cozy/Humorous Mystery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s://www.stopyourekillingme.com/Awards/Anthony_Awards.html</text:p>
          </table:table-cell>
          <table:table-cell office:value-type="string" calcext:value-type="string">
            <text:p>Crime, Mystery &amp; Thriller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Automatic | Stop, You're Killing Me | LibraryThing</text:p>
          </table:table-cell>
          <table:table-cell office:value-type="string" calcext:value-type="string">
            <text:p>not_checked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anthony_award_critical_nonfiction_work</text:p>
          </table:table-cell>
          <table:table-cell office:value-type="string" calcext:value-type="string">
            <text:p>Anthony Award - Critical/Nonfiction Work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s://www.stopyourekillingme.com/Awards/Anthony_Awards.html</text:p>
          </table:table-cell>
          <table:table-cell office:value-type="string" calcext:value-type="string">
            <text:p>Crime, Mystery &amp; Thriller | Nonfiction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Automatic | Stop, You're Killing Me | LibraryThing</text:p>
          </table:table-cell>
          <table:table-cell office:value-type="string" calcext:value-type="string">
            <text:p>not_checked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anthony_award_first_mystery</text:p>
          </table:table-cell>
          <table:table-cell office:value-type="string" calcext:value-type="string">
            <text:p>Anthony Award - First Mystery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s://www.stopyourekillingme.com/Awards/Anthony_Awards.html</text:p>
          </table:table-cell>
          <table:table-cell office:value-type="string" calcext:value-type="string">
            <text:p>Crime, Mystery &amp; Thriller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Automatic | Stop, You're Killing Me | LibraryThing</text:p>
          </table:table-cell>
          <table:table-cell office:value-type="string" calcext:value-type="string">
            <text:p>not_checked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anthony_award_historical_mystery</text:p>
          </table:table-cell>
          <table:table-cell office:value-type="string" calcext:value-type="string">
            <text:p>Anthony Award - Historical Mystery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s://www.stopyourekillingme.com/Awards/Anthony_Awards.html</text:p>
          </table:table-cell>
          <table:table-cell office:value-type="string" calcext:value-type="string">
            <text:p>Crime, Mystery &amp; Thriller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Automatic | Stop, You're Killing Me | LibraryThing</text:p>
          </table:table-cell>
          <table:table-cell office:value-type="string" calcext:value-type="string">
            <text:p>not_checked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anthony_award_mystery_novel</text:p>
          </table:table-cell>
          <table:table-cell office:value-type="string" calcext:value-type="string">
            <text:p>Anthony Award - Mystery Nove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s://www.stopyourekillingme.com/Awards/Anthony_Awards.html</text:p>
          </table:table-cell>
          <table:table-cell office:value-type="string" calcext:value-type="string">
            <text:p>Crime, Mystery &amp; Thriller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Automatic | Stop, You're Killing Me | LibraryThing</text:p>
          </table:table-cell>
          <table:table-cell office:value-type="string" calcext:value-type="string">
            <text:p>not_checked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anthony_award_paperback_e_book_audiobook</text:p>
          </table:table-cell>
          <table:table-cell office:value-type="string" calcext:value-type="string">
            <text:p>Anthony Award - Paperback/E-book/Audiobook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s://www.stopyourekillingme.com/Awards/Anthony_Awards.html</text:p>
          </table:table-cell>
          <table:table-cell office:value-type="string" calcext:value-type="string">
            <text:p>Crime, Mystery &amp; Thriller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Automatic | Stop, You're Killing Me | LibraryThing</text:p>
          </table:table-cell>
          <table:table-cell office:value-type="string" calcext:value-type="string">
            <text:p>not_checked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anthony_award_paranormal_mystery</text:p>
          </table:table-cell>
          <table:table-cell office:value-type="string" calcext:value-type="string">
            <text:p>Anthony Award - Paranormal Mystery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s://www.stopyourekillingme.com/Awards/Anthony_Awards.html</text:p>
          </table:table-cell>
          <table:table-cell office:value-type="string" calcext:value-type="string">
            <text:p>Crime, Mystery &amp; Thriller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Automatic | Stop, You're Killing Me | LibraryThing</text:p>
          </table:table-cell>
          <table:table-cell office:value-type="string" calcext:value-type="string">
            <text:p>not_checked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arthur_c_clarke_award_novel</text:p>
          </table:table-cell>
          <table:table-cell office:value-type="string" calcext:value-type="string">
            <text:p>Arthur C. Clarke Award - Nove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s://www.clarkeaward.com/</text:p>
          </table:table-cell>
          <table:table-cell office:value-type="string" calcext:value-type="string">
            <text:p>Science Fiction | Regional &amp; National Awards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Automatic | Official Arthur C. Clarke Award | SFADB</text:p>
          </table:table-cell>
          <table:table-cell office:value-type="string" calcext:value-type="string">
            <text:p>not_checked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aurealis_anthology</text:p>
          </table:table-cell>
          <table:table-cell office:value-type="string" calcext:value-type="string">
            <text:p>Aurealis - Anthology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s://www.sfadb.com/Aurealis_Awards</text:p>
          </table:table-cell>
          <table:table-cell office:value-type="string" calcext:value-type="string">
            <text:p>Science Fiction | Fantasy | Regional &amp; National Awards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Automatic | SFADB | ISFDB | LibraryThing</text:p>
          </table:table-cell>
          <table:table-cell office:value-type="string" calcext:value-type="string">
            <text:p>not_checked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aurealis_childrens_8_12_illustrated_work_picture_book</text:p>
          </table:table-cell>
          <table:table-cell office:value-type="string" calcext:value-type="string">
            <text:p>Aurealis - Children's 8-12 Illustrated Work/Picture Book (discontinued)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s://www.sfadb.com/Aurealis_Awards</text:p>
          </table:table-cell>
          <table:table-cell office:value-type="string" calcext:value-type="string">
            <text:p>Young Adult &amp; Children's Literature | Science Fiction | Fantasy | Regional &amp; National Awards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Automatic | SFADB | ISFDB | LibraryThing</text:p>
          </table:table-cell>
          <table:table-cell office:value-type="string" calcext:value-type="string">
            <text:p>not_checked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aurealis_childrens_8_12_long_fiction</text:p>
          </table:table-cell>
          <table:table-cell office:value-type="string" calcext:value-type="string">
            <text:p>Aurealis - Children's 8-12 Long Fiction (discontinued)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s://www.sfadb.com/Aurealis_Awards</text:p>
          </table:table-cell>
          <table:table-cell office:value-type="string" calcext:value-type="string">
            <text:p>Young Adult &amp; Children's Literature | Science Fiction | Fantasy | Regional &amp; National Awards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Automatic | SFADB | ISFDB | LibraryThing</text:p>
          </table:table-cell>
          <table:table-cell office:value-type="string" calcext:value-type="string">
            <text:p>not_checked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aurealis_childrens_book</text:p>
          </table:table-cell>
          <table:table-cell office:value-type="string" calcext:value-type="string">
            <text:p>Aurealis - Children's Book (discontinued)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s://www.sfadb.com/Aurealis_Awards</text:p>
          </table:table-cell>
          <table:table-cell office:value-type="string" calcext:value-type="string">
            <text:p>Young Adult &amp; Children's Literature | Science Fiction | Fantasy | Regional &amp; National Awards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Automatic | SFADB | ISFDB | LibraryThing</text:p>
          </table:table-cell>
          <table:table-cell office:value-type="string" calcext:value-type="string">
            <text:p>not_checked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aurealis_childrens_fiction</text:p>
          </table:table-cell>
          <table:table-cell office:value-type="string" calcext:value-type="string">
            <text:p>Aurealis - Children's Fictio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s://www.sfadb.com/Aurealis_Awards</text:p>
          </table:table-cell>
          <table:table-cell office:value-type="string" calcext:value-type="string">
            <text:p>Young Adult &amp; Children's Literature | Science Fiction | Fantasy | Regional &amp; National Awards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Automatic | SFADB | ISFDB | LibraryThing</text:p>
          </table:table-cell>
          <table:table-cell office:value-type="string" calcext:value-type="string">
            <text:p>not_checked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aurealis_childrens_fiction_pictures</text:p>
          </table:table-cell>
          <table:table-cell office:value-type="string" calcext:value-type="string">
            <text:p>Aurealis - Children's Fiction (Pictures) (discontinued)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s://www.sfadb.com/Aurealis_Awards</text:p>
          </table:table-cell>
          <table:table-cell office:value-type="string" calcext:value-type="string">
            <text:p>Young Adult &amp; Children's Literature | Science Fiction | Fantasy | Regional &amp; National Awards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Automatic | SFADB | ISFDB | LibraryThing</text:p>
          </table:table-cell>
          <table:table-cell office:value-type="string" calcext:value-type="string">
            <text:p>not_checked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aurealis_childrens_fiction_words</text:p>
          </table:table-cell>
          <table:table-cell office:value-type="string" calcext:value-type="string">
            <text:p>Aurealis - Children's Fiction (Words) (discontinued)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s://www.sfadb.com/Aurealis_Awards</text:p>
          </table:table-cell>
          <table:table-cell office:value-type="string" calcext:value-type="string">
            <text:p>Young Adult &amp; Children's Literature | Science Fiction | Fantasy | Regional &amp; National Awards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Automatic | SFADB | ISFDB | LibraryThing</text:p>
          </table:table-cell>
          <table:table-cell office:value-type="string" calcext:value-type="string">
            <text:p>not_checked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aurealis_collection</text:p>
          </table:table-cell>
          <table:table-cell office:value-type="string" calcext:value-type="string">
            <text:p>Aurealis - Collectio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s://www.sfadb.com/Aurealis_Awards</text:p>
          </table:table-cell>
          <table:table-cell office:value-type="string" calcext:value-type="string">
            <text:p>Science Fiction | Fantasy | Regional &amp; National Awards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Automatic | SFADB | ISFDB | LibraryThing</text:p>
          </table:table-cell>
          <table:table-cell office:value-type="string" calcext:value-type="string">
            <text:p>not_checked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aurealis_fantasy_novel</text:p>
          </table:table-cell>
          <table:table-cell office:value-type="string" calcext:value-type="string">
            <text:p>Aurealis - Fantasy Nove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s://www.sfadb.com/Aurealis_Awards</text:p>
          </table:table-cell>
          <table:table-cell office:value-type="string" calcext:value-type="string">
            <text:p>Fantasy | Regional &amp; National Awards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Automatic | SFADB | ISFDB | LibraryThing</text:p>
          </table:table-cell>
          <table:table-cell office:value-type="string" calcext:value-type="string">
            <text:p>not_checked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aurealis_fantasy_novella</text:p>
          </table:table-cell>
          <table:table-cell office:value-type="string" calcext:value-type="string">
            <text:p>Aurealis - Fantasy Novella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s://www.sfadb.com/Aurealis_Awards</text:p>
          </table:table-cell>
          <table:table-cell office:value-type="string" calcext:value-type="string">
            <text:p>Fantasy | Regional &amp; National Awards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Automatic | SFADB | ISFDB | LibraryThing</text:p>
          </table:table-cell>
          <table:table-cell office:value-type="string" calcext:value-type="string">
            <text:p>not_checked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aurealis_golden_aurealis_novel</text:p>
          </table:table-cell>
          <table:table-cell office:value-type="string" calcext:value-type="string">
            <text:p>Aurealis - Golden Aurealis Novel (discontinued)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s://www.sfadb.com/Aurealis_Awards</text:p>
          </table:table-cell>
          <table:table-cell office:value-type="string" calcext:value-type="string">
            <text:p>Young Adult &amp; Children's Literature | Science Fiction | Fantasy | Regional &amp; National Awards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Automatic | SFADB | ISFDB | LibraryThing</text:p>
          </table:table-cell>
          <table:table-cell office:value-type="string" calcext:value-type="string">
            <text:p>not_checked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aurealis_graphic_novel_illustrated_work</text:p>
          </table:table-cell>
          <table:table-cell office:value-type="string" calcext:value-type="string">
            <text:p>Aurealis - Graphic Novel/Illustrated Work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s://www.sfadb.com/Aurealis_Awards</text:p>
          </table:table-cell>
          <table:table-cell office:value-type="string" calcext:value-type="string">
            <text:p>Science Fiction | Fantasy | Regional &amp; National Awards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Automatic | SFADB | ISFDB | LibraryThing</text:p>
          </table:table-cell>
          <table:table-cell office:value-type="string" calcext:value-type="string">
            <text:p>not_checked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aurealis_horror_novel</text:p>
          </table:table-cell>
          <table:table-cell office:value-type="string" calcext:value-type="string">
            <text:p>Aurealis - Horror Nove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s://www.sfadb.com/Aurealis_Awards</text:p>
          </table:table-cell>
          <table:table-cell office:value-type="string" calcext:value-type="string">
            <text:p>Horror &amp; Dark Fiction | Regional &amp; National Awards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Automatic | SFADB | ISFDB | LibraryThing</text:p>
          </table:table-cell>
          <table:table-cell office:value-type="string" calcext:value-type="string">
            <text:p>not_checked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aurealis_horror_novella</text:p>
          </table:table-cell>
          <table:table-cell office:value-type="string" calcext:value-type="string">
            <text:p>Aurealis - Horror Novella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s://www.sfadb.com/Aurealis_Awards</text:p>
          </table:table-cell>
          <table:table-cell office:value-type="string" calcext:value-type="string">
            <text:p>Horror &amp; Dark Fiction | Regional &amp; National Awards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Automatic | SFADB | ISFDB | LibraryThing</text:p>
          </table:table-cell>
          <table:table-cell office:value-type="string" calcext:value-type="string">
            <text:p>not_checked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aurealis_sara_douglass_book_series_award</text:p>
          </table:table-cell>
          <table:table-cell office:value-type="string" calcext:value-type="string">
            <text:p>Aurealis - Sara Douglass Book Series Awar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s://www.sfadb.com/Aurealis_Awards</text:p>
          </table:table-cell>
          <table:table-cell office:value-type="string" calcext:value-type="string">
            <text:p>Science Fiction | Fantasy | Regional &amp; National Awards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Automatic | SFADB | ISFDB</text:p>
          </table:table-cell>
          <table:table-cell office:value-type="string" calcext:value-type="string">
            <text:p>not_checked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aurealis_sf_novel</text:p>
          </table:table-cell>
          <table:table-cell office:value-type="string" calcext:value-type="string">
            <text:p>Aurealis - SF Nove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s://www.sfadb.com/Aurealis_Awards</text:p>
          </table:table-cell>
          <table:table-cell office:value-type="string" calcext:value-type="string">
            <text:p>Science Fiction | Regional &amp; National Awards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Automatic | SFADB | ISFDB | LibraryThing</text:p>
          </table:table-cell>
          <table:table-cell office:value-type="string" calcext:value-type="string">
            <text:p>not_checked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aurealis_sf_novella</text:p>
          </table:table-cell>
          <table:table-cell office:value-type="string" calcext:value-type="string">
            <text:p>Aurealis - SF Novella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s://www.sfadb.com/Aurealis_Awards</text:p>
          </table:table-cell>
          <table:table-cell office:value-type="string" calcext:value-type="string">
            <text:p>Science Fiction | Regional &amp; National Awards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Automatic | SFADB | ISFDB | LibraryThing</text:p>
          </table:table-cell>
          <table:table-cell office:value-type="string" calcext:value-type="string">
            <text:p>not_checked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aurealis_young_adult_novel</text:p>
          </table:table-cell>
          <table:table-cell office:value-type="string" calcext:value-type="string">
            <text:p>Aurealis - Young Adult Nove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s://www.sfadb.com/Aurealis_Awards</text:p>
          </table:table-cell>
          <table:table-cell office:value-type="string" calcext:value-type="string">
            <text:p>Young Adult &amp; Children's Literature | Science Fiction | Fantasy | Regional &amp; National Awards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Automatic | SFADB | ISFDB | LibraryThing</text:p>
          </table:table-cell>
          <table:table-cell office:value-type="string" calcext:value-type="string">
            <text:p>not_checked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aurora_graphic_novel</text:p>
          </table:table-cell>
          <table:table-cell office:value-type="string" calcext:value-type="string">
            <text:p>Aurora - Graphic Nove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s://www.sfadb.com/Aurora_Awards</text:p>
          </table:table-cell>
          <table:table-cell office:value-type="string" calcext:value-type="string">
            <text:p>Science Fiction | Fantasy | Regional &amp; National Awards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Automatic | SFADB | ISFDB</text:p>
          </table:table-cell>
          <table:table-cell office:value-type="string" calcext:value-type="string">
            <text:p>not_checked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aurora_novel</text:p>
          </table:table-cell>
          <table:table-cell office:value-type="string" calcext:value-type="string">
            <text:p>Aurora - Nove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s://www.sfadb.com/Aurora_Awards</text:p>
          </table:table-cell>
          <table:table-cell office:value-type="string" calcext:value-type="string">
            <text:p>Science Fiction | Fantasy | Regional &amp; National Awards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Automatic | SFADB | ISFDB</text:p>
          </table:table-cell>
          <table:table-cell office:value-type="string" calcext:value-type="string">
            <text:p>not_checked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aurora_novelette_novella</text:p>
          </table:table-cell>
          <table:table-cell office:value-type="string" calcext:value-type="string">
            <text:p>Aurora - Novelette/Novella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s://www.sfadb.com/Aurora_Awards</text:p>
          </table:table-cell>
          <table:table-cell office:value-type="string" calcext:value-type="string">
            <text:p>Science Fiction | Fantasy | Regional &amp; National Awards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Automatic | SFADB | ISFDB</text:p>
          </table:table-cell>
          <table:table-cell office:value-type="string" calcext:value-type="string">
            <text:p>not_checked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aurora_related_work</text:p>
          </table:table-cell>
          <table:table-cell office:value-type="string" calcext:value-type="string">
            <text:p>Aurora - Related Work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s://www.sfadb.com/Aurora_Awards</text:p>
          </table:table-cell>
          <table:table-cell office:value-type="string" calcext:value-type="string">
            <text:p>Nonfiction | Science Fiction | Fantasy | Regional &amp; National Awards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not_checked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aurora_ya_novel</text:p>
          </table:table-cell>
          <table:table-cell office:value-type="string" calcext:value-type="string">
            <text:p>Aurora - YA Nove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s://www.sfadb.com/Aurora_Awards</text:p>
          </table:table-cell>
          <table:table-cell office:value-type="string" calcext:value-type="string">
            <text:p>Young Adult &amp; Children's Literature | Science Fiction | Fantasy | Regional &amp; National Awards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Automatic | SFADB | ISFDB</text:p>
          </table:table-cell>
          <table:table-cell office:value-type="string" calcext:value-type="string">
            <text:p>not_checked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australasian_shadows_collected_work</text:p>
          </table:table-cell>
          <table:table-cell office:value-type="string" calcext:value-type="string">
            <text:p>Australasian Shadows - Collected Work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s://australasianhorror.com/australian-shadows-awards/</text:p>
          </table:table-cell>
          <table:table-cell office:value-type="string" calcext:value-type="string">
            <text:p>Horror &amp; Dark Fiction | Regional &amp; National Awards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Automatic | Australasian Horror Writers Association | Wikipedia</text:p>
          </table:table-cell>
          <table:table-cell office:value-type="string" calcext:value-type="string">
            <text:p>not_checked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australasian_shadows_edited_work</text:p>
          </table:table-cell>
          <table:table-cell office:value-type="string" calcext:value-type="string">
            <text:p>Australasian Shadows - Edited Work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s://australasianhorror.com/australian-shadows-awards/</text:p>
          </table:table-cell>
          <table:table-cell office:value-type="string" calcext:value-type="string">
            <text:p>Horror &amp; Dark Fiction | Regional &amp; National Awards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Automatic | Australasian Horror Writers Association | Wikipedia</text:p>
          </table:table-cell>
          <table:table-cell office:value-type="string" calcext:value-type="string">
            <text:p>not_checked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australasian_shadows_graphic_novel</text:p>
          </table:table-cell>
          <table:table-cell office:value-type="string" calcext:value-type="string">
            <text:p>Australasian Shadows - Graphic Novel/Comic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s://australasianhorror.com/australian-shadows-awards/</text:p>
          </table:table-cell>
          <table:table-cell office:value-type="string" calcext:value-type="string">
            <text:p>Horror &amp; Dark Fiction | Regional &amp; National Awards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Automatic | Australasian Horror Writers Association | Wikipedia</text:p>
          </table:table-cell>
          <table:table-cell office:value-type="string" calcext:value-type="string">
            <text:p>not_checked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australasian_shadows_long_fiction</text:p>
          </table:table-cell>
          <table:table-cell office:value-type="string" calcext:value-type="string">
            <text:p>Australasian Shadows - Long Fictio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s://australasianhorror.com/australian-shadows-awards/</text:p>
          </table:table-cell>
          <table:table-cell office:value-type="string" calcext:value-type="string">
            <text:p>Horror &amp; Dark Fiction | Regional &amp; National Awards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Automatic | Australasian Horror Writers Association | Wikipedia</text:p>
          </table:table-cell>
          <table:table-cell office:value-type="string" calcext:value-type="string">
            <text:p>not_checked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australasian_shadows_nonfiction</text:p>
          </table:table-cell>
          <table:table-cell office:value-type="string" calcext:value-type="string">
            <text:p>Australasian Shadows - Non-Fictio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s://australasianhorror.com/australian-shadows-awards/</text:p>
          </table:table-cell>
          <table:table-cell office:value-type="string" calcext:value-type="string">
            <text:p>Horror &amp; Dark Fiction | Regional &amp; National Awards | Nonfiction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Automatic | Australasian Horror Writers Association | Wikipedia</text:p>
          </table:table-cell>
          <table:table-cell office:value-type="string" calcext:value-type="string">
            <text:p>not_checked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australasian_shadows_novel</text:p>
          </table:table-cell>
          <table:table-cell office:value-type="string" calcext:value-type="string">
            <text:p>Australasian Shadows - Nove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s://australasianhorror.com/australian-shadows-awards/</text:p>
          </table:table-cell>
          <table:table-cell office:value-type="string" calcext:value-type="string">
            <text:p>Horror &amp; Dark Fiction | Regional &amp; National Awards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Automatic | Australasian Horror Writers Association | Wikipedia</text:p>
          </table:table-cell>
          <table:table-cell office:value-type="string" calcext:value-type="string">
            <text:p>not_checked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australian_romance_readers_awards</text:p>
          </table:table-cell>
          <table:table-cell office:value-type="string" calcext:value-type="string">
            <text:p>Australian Romance Readers Awards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s://australianromancereaders.com.au/awards/</text:p>
          </table:table-cell>
          <table:table-cell office:value-type="string" calcext:value-type="string">
            <text:p>Romance | Regional &amp; National Awards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not_checked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baillie_gifford_prize</text:p>
          </table:table-cell>
          <table:table-cell office:value-type="string" calcext:value-type="string">
            <text:p>Baillie Gifford Priz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s://www.thebailliegiffordprize.co.uk/year-by-year</text:p>
          </table:table-cell>
          <table:table-cell office:value-type="string" calcext:value-type="string">
            <text:p>Nonfiction | Regional &amp; National Awards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Automatic | Official Baillie Gifford | Wikipedia</text:p>
          </table:table-cell>
          <table:table-cell office:value-type="string" calcext:value-type="string">
            <text:p>not_checked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barnes_noble_book_club</text:p>
          </table:table-cell>
          <table:table-cell office:value-type="string" calcext:value-type="string">
            <text:p>Barnes &amp; Noble Book Club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s://www.booknotification.com/book-clubs/barnes-noble-book-club/</text:p>
          </table:table-cell>
          <table:table-cell office:value-type="string" calcext:value-type="string">
            <text:p>General Audience Book Clubs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not_checked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barry_award_british_crime_novel</text:p>
          </table:table-cell>
          <table:table-cell office:value-type="string" calcext:value-type="string">
            <text:p>Barry Award - British Crime Nove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s://www.stopyourekillingme.com/Awards/Barry_Awards.html</text:p>
          </table:table-cell>
          <table:table-cell office:value-type="string" calcext:value-type="string">
            <text:p>Crime, Mystery &amp; Thriller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Automatic | Stop, You're Killing Me | LibraryThing</text:p>
          </table:table-cell>
          <table:table-cell office:value-type="string" calcext:value-type="string">
            <text:p>not_checked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barry_award_first_mystery_novel</text:p>
          </table:table-cell>
          <table:table-cell office:value-type="string" calcext:value-type="string">
            <text:p>Barry Award - First Mystery Nove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s://www.stopyourekillingme.com/Awards/Barry_Awards.html</text:p>
          </table:table-cell>
          <table:table-cell office:value-type="string" calcext:value-type="string">
            <text:p>Crime, Mystery &amp; Thriller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Automatic | Stop, You're Killing Me | LibraryThing</text:p>
          </table:table-cell>
          <table:table-cell office:value-type="string" calcext:value-type="string">
            <text:p>not_checked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barry_award_mystery_novel</text:p>
          </table:table-cell>
          <table:table-cell office:value-type="string" calcext:value-type="string">
            <text:p>Barry Award - Mystery Nove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s://www.stopyourekillingme.com/Awards/Barry_Awards.html</text:p>
          </table:table-cell>
          <table:table-cell office:value-type="string" calcext:value-type="string">
            <text:p>Crime, Mystery &amp; Thriller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Automatic | Stop, You're Killing Me | LibraryThing</text:p>
          </table:table-cell>
          <table:table-cell office:value-type="string" calcext:value-type="string">
            <text:p>not_checked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barry_award_paperback_original</text:p>
          </table:table-cell>
          <table:table-cell office:value-type="string" calcext:value-type="string">
            <text:p>Barry Award - Paperback Origina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s://www.stopyourekillingme.com/Awards/Barry_Awards.html</text:p>
          </table:table-cell>
          <table:table-cell office:value-type="string" calcext:value-type="string">
            <text:p>Crime, Mystery &amp; Thriller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Automatic | Stop, You're Killing Me | LibraryThing</text:p>
          </table:table-cell>
          <table:table-cell office:value-type="string" calcext:value-type="string">
            <text:p>not_checked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barry_award_thriller</text:p>
          </table:table-cell>
          <table:table-cell office:value-type="string" calcext:value-type="string">
            <text:p>Barry Award - Thriller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s://www.stopyourekillingme.com/Awards/Barry_Awards.html</text:p>
          </table:table-cell>
          <table:table-cell office:value-type="string" calcext:value-type="string">
            <text:p>Crime, Mystery &amp; Thriller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Automatic | Stop, You're Killing Me | LibraryThing</text:p>
          </table:table-cell>
          <table:table-cell office:value-type="string" calcext:value-type="string">
            <text:p>not_checked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between_two_books_isolation_reading_lists</text:p>
          </table:table-cell>
          <table:table-cell office:value-type="string" calcext:value-type="string">
            <text:p>Between Two Books - Isolation &amp; Themed Lists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s://betweentwobooks.co.uk/</text:p>
          </table:table-cell>
          <table:table-cell office:value-type="string" calcext:value-type="string">
            <text:p>Online Community Book Clubs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Checked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between_two_books_numbered_archive</text:p>
          </table:table-cell>
          <table:table-cell office:value-type="string" calcext:value-type="string">
            <text:p>Between Two Books - Official Book List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s://betweentwobooks.co.uk/</text:p>
          </table:table-cell>
          <table:table-cell office:value-type="string" calcext:value-type="string">
            <text:p>Online Community Book Clubs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Checked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big_library_read</text:p>
          </table:table-cell>
          <table:table-cell office:value-type="string" calcext:value-type="string">
            <text:p>Big Library Read (discontinued)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s://www.biglibraryread.com/past-titles/</text:p>
          </table:table-cell>
          <table:table-cell office:value-type="string" calcext:value-type="string">
            <text:p>Online Community Book Clubs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Checked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bookbrowse_online_book_club</text:p>
          </table:table-cell>
          <table:table-cell office:value-type="string" calcext:value-type="string">
            <text:p>BookBrowse Online Book Club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s://www.bookbrowse.com/onlinebookclub/</text:p>
          </table:table-cell>
          <table:table-cell office:value-type="string" calcext:value-type="string">
            <text:p>Online Community Book Clubs | General Audience Book Clubs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Checked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booker_prize</text:p>
          </table:table-cell>
          <table:table-cell office:value-type="string" calcext:value-type="string">
            <text:p>Booker Priz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s://thebookerprizes.com/the-booker-library/prize-years</text:p>
          </table:table-cell>
          <table:table-cell office:value-type="string" calcext:value-type="string">
            <text:p>Literary &amp; General Fiction | Regional &amp; National Awards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Automatic | Official Booker | Wikipedia</text:p>
          </table:table-cell>
          <table:table-cell office:value-type="string" calcext:value-type="string">
            <text:p>not_checked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ooksellers_best_award</text:p>
          </table:table-cell>
          <table:table-cell office:value-type="string" calcext:value-type="string">
            <text:p>Booksellers' Best Awar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s://web.archive.org/web/*/http://www.gdrwa.org/contests.html</text:p>
          </table:table-cell>
          <table:table-cell office:value-type="string" calcext:value-type="string">
            <text:p>Romance | Regional &amp; National Awards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not_checked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ram_stoker_anthology</text:p>
          </table:table-cell>
          <table:table-cell office:value-type="string" calcext:value-type="string">
            <text:p>Bram Stoker - Anthology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s://www.sfadb.com/Bram_Stoker_Awards</text:p>
          </table:table-cell>
          <table:table-cell office:value-type="string" calcext:value-type="string">
            <text:p>Horror &amp; Dark Fiction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Automatic | SFADB | ISFDB</text:p>
          </table:table-cell>
          <table:table-cell office:value-type="string" calcext:value-type="string">
            <text:p>not_checked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ram_stoker_fiction_collection</text:p>
          </table:table-cell>
          <table:table-cell office:value-type="string" calcext:value-type="string">
            <text:p>Bram Stoker - Fiction Collectio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s://www.sfadb.com/Bram_Stoker_Awards</text:p>
          </table:table-cell>
          <table:table-cell office:value-type="string" calcext:value-type="string">
            <text:p>Horror &amp; Dark Fiction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not_checked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ram_stoker_first_novel</text:p>
          </table:table-cell>
          <table:table-cell office:value-type="string" calcext:value-type="string">
            <text:p>Bram Stoker - First Nove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s://www.sfadb.com/Bram_Stoker_Awards</text:p>
          </table:table-cell>
          <table:table-cell office:value-type="string" calcext:value-type="string">
            <text:p>Horror &amp; Dark Fiction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Automatic | SFADB | ISFDB</text:p>
          </table:table-cell>
          <table:table-cell office:value-type="string" calcext:value-type="string">
            <text:p>not_checked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ram_stoker_graphic_novel</text:p>
          </table:table-cell>
          <table:table-cell office:value-type="string" calcext:value-type="string">
            <text:p>Bram Stoker - Graphic Nove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s://www.sfadb.com/Bram_Stoker_Awards</text:p>
          </table:table-cell>
          <table:table-cell office:value-type="string" calcext:value-type="string">
            <text:p>Horror &amp; Dark Fiction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Automatic | SFADB | ISFDB</text:p>
          </table:table-cell>
          <table:table-cell office:value-type="string" calcext:value-type="string">
            <text:p>not_checked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ram_stoker_long_fiction</text:p>
          </table:table-cell>
          <table:table-cell office:value-type="string" calcext:value-type="string">
            <text:p>Bram Stoker - Long Fictio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s://www.sfadb.com/Bram_Stoker_Awards</text:p>
          </table:table-cell>
          <table:table-cell office:value-type="string" calcext:value-type="string">
            <text:p>Horror &amp; Dark Fiction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Automatic | SFADB | ISFDB</text:p>
          </table:table-cell>
          <table:table-cell office:value-type="string" calcext:value-type="string">
            <text:p>not_checked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ram_stoker_middle_grade_novel</text:p>
          </table:table-cell>
          <table:table-cell office:value-type="string" calcext:value-type="string">
            <text:p>Bram Stoker - Middle Grade Nove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s://www.sfadb.com/Bram_Stoker_Awards</text:p>
          </table:table-cell>
          <table:table-cell office:value-type="string" calcext:value-type="string">
            <text:p>Horror &amp; Dark Fiction | Young Adult &amp; Children's Literature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Automatic | SFADB | ISFDB</text:p>
          </table:table-cell>
          <table:table-cell office:value-type="string" calcext:value-type="string">
            <text:p>not_checked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ram_stoker_nonfiction</text:p>
          </table:table-cell>
          <table:table-cell office:value-type="string" calcext:value-type="string">
            <text:p>Bram Stoker - Nonfictio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s://www.sfadb.com/Bram_Stoker_Awards</text:p>
          </table:table-cell>
          <table:table-cell office:value-type="string" calcext:value-type="string">
            <text:p>Horror &amp; Dark Fiction | Nonfiction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Automatic | SFADB | ISFDB</text:p>
          </table:table-cell>
          <table:table-cell office:value-type="string" calcext:value-type="string">
            <text:p>not_checked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ram_stoker_novel</text:p>
          </table:table-cell>
          <table:table-cell office:value-type="string" calcext:value-type="string">
            <text:p>Bram Stoker - Nove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s://www.sfadb.com/Bram_Stoker_Awards</text:p>
          </table:table-cell>
          <table:table-cell office:value-type="string" calcext:value-type="string">
            <text:p>Horror &amp; Dark Fiction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Automatic | SFADB | ISFDB</text:p>
          </table:table-cell>
          <table:table-cell office:value-type="string" calcext:value-type="string">
            <text:p>not_checked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ram_stoker_poetry_collection</text:p>
          </table:table-cell>
          <table:table-cell office:value-type="string" calcext:value-type="string">
            <text:p>Bram Stoker - Poetry Collectio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s://www.sfadb.com/Bram_Stoker_Awards</text:p>
          </table:table-cell>
          <table:table-cell office:value-type="string" calcext:value-type="string">
            <text:p>Horror &amp; Dark Fiction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Automatic | SFADB | ISFDB</text:p>
          </table:table-cell>
          <table:table-cell office:value-type="string" calcext:value-type="string">
            <text:p>not_checked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ram_stoker_young_adult_novel</text:p>
          </table:table-cell>
          <table:table-cell office:value-type="string" calcext:value-type="string">
            <text:p>Bram Stoker - Young Adult Nove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s://www.sfadb.com/Bram_Stoker_Awards</text:p>
          </table:table-cell>
          <table:table-cell office:value-type="string" calcext:value-type="string">
            <text:p>Horror &amp; Dark Fiction | Young Adult &amp; Children's Literature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Automatic | SFADB | ISFDB</text:p>
          </table:table-cell>
          <table:table-cell office:value-type="string" calcext:value-type="string">
            <text:p>not_checked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british_fantasy_anthology</text:p>
          </table:table-cell>
          <table:table-cell office:value-type="string" calcext:value-type="string">
            <text:p>British Fantasy - Anthology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s://britishfantasysociety.org/about-the-bfs/the-british-fantasy-awards/bfa-winners/</text:p>
          </table:table-cell>
          <table:table-cell office:value-type="string" calcext:value-type="string">
            <text:p>Fantasy | Horror &amp; Dark Fiction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not_checked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british_fantasy_best_novel</text:p>
          </table:table-cell>
          <table:table-cell office:value-type="string" calcext:value-type="string">
            <text:p>British Fantasy - Best Novel (discontinued)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s://britishfantasysociety.org/about-the-bfs/the-british-fantasy-awards/bfa-winners/</text:p>
          </table:table-cell>
          <table:table-cell office:value-type="string" calcext:value-type="string">
            <text:p>Fantasy | Horror &amp; Dark Fiction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not_checked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british_fantasy_collection</text:p>
          </table:table-cell>
          <table:table-cell office:value-type="string" calcext:value-type="string">
            <text:p>British Fantasy - Collectio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s://britishfantasysociety.org/about-the-bfs/the-british-fantasy-awards/bfa-winners/</text:p>
          </table:table-cell>
          <table:table-cell office:value-type="string" calcext:value-type="string">
            <text:p>Fantasy | Horror &amp; Dark Fiction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not_checked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british_fantasy_fantasy_novel</text:p>
          </table:table-cell>
          <table:table-cell office:value-type="string" calcext:value-type="string">
            <text:p>British Fantasy - Fantasy Nove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s://britishfantasysociety.org/about-the-bfs/the-british-fantasy-awards/bfa-winners/</text:p>
          </table:table-cell>
          <table:table-cell office:value-type="string" calcext:value-type="string">
            <text:p>Fantasy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not_checked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british_fantasy_horror_novel</text:p>
          </table:table-cell>
          <table:table-cell office:value-type="string" calcext:value-type="string">
            <text:p>British Fantasy - Horror Nove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s://britishfantasysociety.org/about-the-bfs/the-british-fantasy-awards/bfa-winners/</text:p>
          </table:table-cell>
          <table:table-cell office:value-type="string" calcext:value-type="string">
            <text:p>Horror &amp; Dark Fiction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not_checked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british_fantasy_nonfiction</text:p>
          </table:table-cell>
          <table:table-cell office:value-type="string" calcext:value-type="string">
            <text:p>British Fantasy - Non-Fictio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s://britishfantasysociety.org/about-the-bfs/the-british-fantasy-awards/bfa-winners/</text:p>
          </table:table-cell>
          <table:table-cell office:value-type="string" calcext:value-type="string">
            <text:p>Fantasy | Horror &amp; Dark Fiction | Nonfiction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not_checked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british_fantasy_novella</text:p>
          </table:table-cell>
          <table:table-cell office:value-type="string" calcext:value-type="string">
            <text:p>British Fantasy - Novella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s://britishfantasysociety.org/about-the-bfs/the-british-fantasy-awards/bfa-winners/</text:p>
          </table:table-cell>
          <table:table-cell office:value-type="string" calcext:value-type="string">
            <text:p>Fantasy | Horror &amp; Dark Fiction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not_checked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bsfa_collection_anthology</text:p>
          </table:table-cell>
          <table:table-cell office:value-type="string" calcext:value-type="string">
            <text:p>BSFA - Collection/Anthology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s://www.sfadb.com/British_SF_Association_Awards</text:p>
          </table:table-cell>
          <table:table-cell office:value-type="string" calcext:value-type="string">
            <text:p>Science Fiction | Fantasy | Regional &amp; National Awards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Automatic | SFADB | ISFDB</text:p>
          </table:table-cell>
          <table:table-cell office:value-type="string" calcext:value-type="string">
            <text:p>not_checked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bsfa_fiction_for_younger_readers</text:p>
          </table:table-cell>
          <table:table-cell office:value-type="string" calcext:value-type="string">
            <text:p>BSFA - Fiction for Younger Readers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s://www.sfadb.com/British_SF_Association_Awards</text:p>
          </table:table-cell>
          <table:table-cell office:value-type="string" calcext:value-type="string">
            <text:p>Young Adult &amp; Children's Literature | Science Fiction | Fantasy | Regional &amp; National Awards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Automatic | SFADB | ISFDB</text:p>
          </table:table-cell>
          <table:table-cell office:value-type="string" calcext:value-type="string">
            <text:p>not_checked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bsfa_long_nonfiction</text:p>
          </table:table-cell>
          <table:table-cell office:value-type="string" calcext:value-type="string">
            <text:p>BSFA - Long Non-Fictio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s://www.sfadb.com/British_SF_Association_Awards</text:p>
          </table:table-cell>
          <table:table-cell office:value-type="string" calcext:value-type="string">
            <text:p>Nonfiction | Science Fiction | Fantasy | Regional &amp; National Awards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Automatic | SFADB | ISFDB</text:p>
          </table:table-cell>
          <table:table-cell office:value-type="string" calcext:value-type="string">
            <text:p>not_checked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bsfa_novel</text:p>
          </table:table-cell>
          <table:table-cell office:value-type="string" calcext:value-type="string">
            <text:p>BSFA - Nove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s://www.sfadb.com/British_SF_Association_Awards</text:p>
          </table:table-cell>
          <table:table-cell office:value-type="string" calcext:value-type="string">
            <text:p>Science Fiction | Fantasy | Regional &amp; National Awards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Automatic | SFADB | ISFDB</text:p>
          </table:table-cell>
          <table:table-cell office:value-type="string" calcext:value-type="string">
            <text:p>not_checked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bsfa_shorter_fiction</text:p>
          </table:table-cell>
          <table:table-cell office:value-type="string" calcext:value-type="string">
            <text:p>BSFA - Shorter Fictio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s://www.sfadb.com/British_SF_Association_Awards</text:p>
          </table:table-cell>
          <table:table-cell office:value-type="string" calcext:value-type="string">
            <text:p>Science Fiction | Fantasy | Regional &amp; National Awards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Automatic | SFADB | ISFDB</text:p>
          </table:table-cell>
          <table:table-cell office:value-type="string" calcext:value-type="string">
            <text:p>not_checked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canada_reads</text:p>
          </table:table-cell>
          <table:table-cell office:value-type="string" calcext:value-type="string">
            <text:p>Canada Reads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s://www.cbc.ca/books/canadareads/past-canada-reads-contenders-and-winners-1.4034451</text:p>
          </table:table-cell>
          <table:table-cell office:value-type="string" calcext:value-type="string">
            <text:p>General Audience Book Clubs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not_checked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carnegie_medal_for_writing</text:p>
          </table:table-cell>
          <table:table-cell office:value-type="string" calcext:value-type="string">
            <text:p>Carnegie Medal for Writi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s://carnegies.co.uk/archive/writing-winners/</text:p>
          </table:table-cell>
          <table:table-cell office:value-type="string" calcext:value-type="string">
            <text:p>Young Adult &amp; Children's Literature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not_checked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cbca_book_of_the_year_early_childhood</text:p>
          </table:table-cell>
          <table:table-cell office:value-type="string" calcext:value-type="string">
            <text:p>CBCA Book of the Year - Early Childhoo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s://cbca.org.au/awards-archive/</text:p>
          </table:table-cell>
          <table:table-cell office:value-type="string" calcext:value-type="string">
            <text:p>Young Adult &amp; Children's Literature | Regional &amp; National Awards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not_checked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cbca_book_of_the_year_eve_pownall</text:p>
          </table:table-cell>
          <table:table-cell office:value-type="string" calcext:value-type="string">
            <text:p>CBCA Book of the Year - Eve Pownal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s://cbca.org.au/awards-archive/</text:p>
          </table:table-cell>
          <table:table-cell office:value-type="string" calcext:value-type="string">
            <text:p>Young Adult &amp; Children's Literature | Regional &amp; National Awards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not_checked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cbca_book_of_the_year_middle_readers</text:p>
          </table:table-cell>
          <table:table-cell office:value-type="string" calcext:value-type="string">
            <text:p>CBCA Book of the Year - Middle Readers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s://cbca.org.au/awards-archive/</text:p>
          </table:table-cell>
          <table:table-cell office:value-type="string" calcext:value-type="string">
            <text:p>Young Adult &amp; Children's Literature | Regional &amp; National Awards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not_checked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cbca_book_of_the_year_new_illustrator</text:p>
          </table:table-cell>
          <table:table-cell office:value-type="string" calcext:value-type="string">
            <text:p>CBCA Book of the Year - New Illustrator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s://cbca.org.au/awards-archive/</text:p>
          </table:table-cell>
          <table:table-cell office:value-type="string" calcext:value-type="string">
            <text:p>Young Adult &amp; Children's Literature | Regional &amp; National Awards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not_checked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cbca_book_of_the_year_older_readers</text:p>
          </table:table-cell>
          <table:table-cell office:value-type="string" calcext:value-type="string">
            <text:p>CBCA Book of the Year - Older Readers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s://cbca.org.au/awards-archive/</text:p>
          </table:table-cell>
          <table:table-cell office:value-type="string" calcext:value-type="string">
            <text:p>Young Adult &amp; Children's Literature | Regional &amp; National Awards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not_checked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cbca_book_of_the_year_picture_book</text:p>
          </table:table-cell>
          <table:table-cell office:value-type="string" calcext:value-type="string">
            <text:p>CBCA Book of the Year - Picture Book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s://cbca.org.au/awards-archive/</text:p>
          </table:table-cell>
          <table:table-cell office:value-type="string" calcext:value-type="string">
            <text:p>Young Adult &amp; Children's Literature | Regional &amp; National Awards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not_checked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cbca_book_of_the_year_younger_readers</text:p>
          </table:table-cell>
          <table:table-cell office:value-type="string" calcext:value-type="string">
            <text:p>CBCA Book of the Year - Younger Readers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s://cbca.org.au/awards-archive/</text:p>
          </table:table-cell>
          <table:table-cell office:value-type="string" calcext:value-type="string">
            <text:p>Young Adult &amp; Children's Literature | Regional &amp; National Awards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not_checked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center_for_fiction_first_novel_prize</text:p>
          </table:table-cell>
          <table:table-cell office:value-type="string" calcext:value-type="string">
            <text:p>Center for Fiction First Novel Priz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s://centerforfiction.org/grants-awards/the-first-novel-prize/</text:p>
          </table:table-cell>
          <table:table-cell office:value-type="string" calcext:value-type="string">
            <text:p>Literary &amp; General Fiction | Regional &amp; National Awards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Automatic | Center for Fiction | Wikipedia</text:p>
          </table:table-cell>
          <table:table-cell office:value-type="string" calcext:value-type="string">
            <text:p>not_checked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costa_whitbread_biography</text:p>
          </table:table-cell>
          <table:table-cell office:value-type="string" calcext:value-type="string">
            <text:p>Costa/Whitbread Book Award - Biography (discontinued)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s://en.wikipedia.org/wiki/Costa_Book_Award_for_Biography</text:p>
          </table:table-cell>
          <table:table-cell office:value-type="string" calcext:value-type="string">
            <text:p>Nonfiction | Regional &amp; National Awards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not_checked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costa_whitbread_book_of_the_year</text:p>
          </table:table-cell>
          <table:table-cell office:value-type="string" calcext:value-type="string">
            <text:p>Costa/Whitbread Book of the Year (discontinued)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s://en.wikipedia.org/wiki/Costa_Book_Awards</text:p>
          </table:table-cell>
          <table:table-cell office:value-type="string" calcext:value-type="string">
            <text:p>Literary &amp; General Fiction | Nonfiction | Young Adult &amp; Children's Literature | Regional &amp; National Awards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not_checked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costa_whitbread_childrens_book</text:p>
          </table:table-cell>
          <table:table-cell office:value-type="string" calcext:value-type="string">
            <text:p>Costa/Whitbread Book Award - Children's Book (discontinued)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s://en.wikipedia.org/wiki/Costa_Book_Award_for_Children%27s_Book</text:p>
          </table:table-cell>
          <table:table-cell office:value-type="string" calcext:value-type="string">
            <text:p>Young Adult &amp; Children's Literature | Regional &amp; National Awards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not_checked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costa_whitbread_first_novel</text:p>
          </table:table-cell>
          <table:table-cell office:value-type="string" calcext:value-type="string">
            <text:p>Costa/Whitbread Book Award - First Novel (discontinued)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s://en.wikipedia.org/wiki/Costa_Book_Award_for_First_Novel</text:p>
          </table:table-cell>
          <table:table-cell office:value-type="string" calcext:value-type="string">
            <text:p>Literary &amp; General Fiction | Regional &amp; National Awards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not_checked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costa_whitbread_novel</text:p>
          </table:table-cell>
          <table:table-cell office:value-type="string" calcext:value-type="string">
            <text:p>Costa/Whitbread Book Award - Novel (discontinued)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s://en.wikipedia.org/wiki/Costa_Book_Award_for_Novel</text:p>
          </table:table-cell>
          <table:table-cell office:value-type="string" calcext:value-type="string">
            <text:p>Literary &amp; General Fiction | Regional &amp; National Awards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not_checked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crime_writers_of_canada_award_first_novel</text:p>
          </table:table-cell>
          <table:table-cell office:value-type="string" calcext:value-type="string">
            <text:p>Crime Writers of Canada Award - First Nove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s://www.librarything.com/award/1612/Crime-Writers-of-Canada-Awards-of-Excellence</text:p>
          </table:table-cell>
          <table:table-cell office:value-type="string" calcext:value-type="string">
            <text:p>Crime, Mystery &amp; Thriller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Automatic | LibraryThing | Wikipedia</text:p>
          </table:table-cell>
          <table:table-cell office:value-type="string" calcext:value-type="string">
            <text:p>not_checked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crime_writers_of_canada_award_french_language_crime_book</text:p>
          </table:table-cell>
          <table:table-cell office:value-type="string" calcext:value-type="string">
            <text:p>Crime Writers of Canada Award - French Language Crime Book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s://www.librarything.com/award/1612/Crime-Writers-of-Canada-Awards-of-Excellence</text:p>
          </table:table-cell>
          <table:table-cell office:value-type="string" calcext:value-type="string">
            <text:p>Crime, Mystery &amp; Thriller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Automatic | LibraryThing | Wikipedia</text:p>
          </table:table-cell>
          <table:table-cell office:value-type="string" calcext:value-type="string">
            <text:p>not_checked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crime_writers_of_canada_award_juvenile_young_adult</text:p>
          </table:table-cell>
          <table:table-cell office:value-type="string" calcext:value-type="string">
            <text:p>Crime Writers of Canada Award - Juvenile/Young Adult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s://www.librarything.com/award/1612/Crime-Writers-of-Canada-Awards-of-Excellence</text:p>
          </table:table-cell>
          <table:table-cell office:value-type="string" calcext:value-type="string">
            <text:p>Crime, Mystery &amp; Thriller | Young Adult &amp; Children's Literature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Automatic | LibraryThing | Wikipedia</text:p>
          </table:table-cell>
          <table:table-cell office:value-type="string" calcext:value-type="string">
            <text:p>not_checked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crime_writers_of_canada_award_nonfiction</text:p>
          </table:table-cell>
          <table:table-cell office:value-type="string" calcext:value-type="string">
            <text:p>Crime Writers of Canada Award - Nonfictio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s://www.librarything.com/award/1612/Crime-Writers-of-Canada-Awards-of-Excellence</text:p>
          </table:table-cell>
          <table:table-cell office:value-type="string" calcext:value-type="string">
            <text:p>Crime, Mystery &amp; Thriller | Nonfiction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Automatic | LibraryThing | Wikipedia</text:p>
          </table:table-cell>
          <table:table-cell office:value-type="string" calcext:value-type="string">
            <text:p>not_checked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crime_writers_of_canada_award_novel</text:p>
          </table:table-cell>
          <table:table-cell office:value-type="string" calcext:value-type="string">
            <text:p>Crime Writers of Canada Award - Nove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s://www.librarything.com/award/1612/Crime-Writers-of-Canada-Awards-of-Excellence</text:p>
          </table:table-cell>
          <table:table-cell office:value-type="string" calcext:value-type="string">
            <text:p>Crime, Mystery &amp; Thriller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Automatic | LibraryThing | Wikipedia</text:p>
          </table:table-cell>
          <table:table-cell office:value-type="string" calcext:value-type="string">
            <text:p>not_checked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cwa_dagger_crime_fiction_in_translation</text:p>
          </table:table-cell>
          <table:table-cell office:value-type="string" calcext:value-type="string">
            <text:p>CWA Dagger - Crime Fiction in Translatio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s://thecwa.co.uk/past-winners/?past_winners_awards[]=international</text:p>
          </table:table-cell>
          <table:table-cell office:value-type="string" calcext:value-type="string">
            <text:p>Crime, Mystery &amp; Thriller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Automatic | Official CWA | LibraryThing</text:p>
          </table:table-cell>
          <table:table-cell office:value-type="string" calcext:value-type="string">
            <text:p>not_checked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cwa_dagger_gold</text:p>
          </table:table-cell>
          <table:table-cell office:value-type="string" calcext:value-type="string">
            <text:p>CWA Dagger - Gold Dagger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s://thecwa.co.uk/past-winners/?past_winners_awards[]=gold</text:p>
          </table:table-cell>
          <table:table-cell office:value-type="string" calcext:value-type="string">
            <text:p>Crime, Mystery &amp; Thriller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Automatic | Official CWA | LibraryThing</text:p>
          </table:table-cell>
          <table:table-cell office:value-type="string" calcext:value-type="string">
            <text:p>not_checked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cwa_dagger_historical</text:p>
          </table:table-cell>
          <table:table-cell office:value-type="string" calcext:value-type="string">
            <text:p>CWA Dagger - Historical Dagger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s://thecwa.co.uk/past-winners/?past_winners_awards[]=historical</text:p>
          </table:table-cell>
          <table:table-cell office:value-type="string" calcext:value-type="string">
            <text:p>Crime, Mystery &amp; Thriller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Automatic | Official CWA | LibraryThing</text:p>
          </table:table-cell>
          <table:table-cell office:value-type="string" calcext:value-type="string">
            <text:p>not_checked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cwa_dagger_ian_fleming_steel</text:p>
          </table:table-cell>
          <table:table-cell office:value-type="string" calcext:value-type="string">
            <text:p>CWA Dagger - Ian Fleming Steel Dagger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s://thecwa.co.uk/past-winners/?past_winners_awards[]=ian-fleming-steel</text:p>
          </table:table-cell>
          <table:table-cell office:value-type="string" calcext:value-type="string">
            <text:p>Crime, Mystery &amp; Thriller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Automatic | Official CWA | LibraryThing</text:p>
          </table:table-cell>
          <table:table-cell office:value-type="string" calcext:value-type="string">
            <text:p>not_checked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davitt_award_adult_novel</text:p>
          </table:table-cell>
          <table:table-cell office:value-type="string" calcext:value-type="string">
            <text:p>Davitt Award - Adult Nove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s://www.librarything.com/award/2525/Davitt-Award</text:p>
          </table:table-cell>
          <table:table-cell office:value-type="string" calcext:value-type="string">
            <text:p>Crime, Mystery &amp; Thriller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Automatic | LibraryThing | Wikipedia</text:p>
          </table:table-cell>
          <table:table-cell office:value-type="string" calcext:value-type="string">
            <text:p>not_checked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davitt_award_childrens_novel</text:p>
          </table:table-cell>
          <table:table-cell office:value-type="string" calcext:value-type="string">
            <text:p>Davitt Award - Children's Nove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s://www.librarything.com/award/2525/Davitt-Award</text:p>
          </table:table-cell>
          <table:table-cell office:value-type="string" calcext:value-type="string">
            <text:p>Crime, Mystery &amp; Thriller | Young Adult &amp; Children's Literature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Automatic | LibraryThing | Wikipedia</text:p>
          </table:table-cell>
          <table:table-cell office:value-type="string" calcext:value-type="string">
            <text:p>not_checked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davitt_award_debut_novel</text:p>
          </table:table-cell>
          <table:table-cell office:value-type="string" calcext:value-type="string">
            <text:p>Davitt Award - Debut Nove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s://www.librarything.com/award/2525/Davitt-Award</text:p>
          </table:table-cell>
          <table:table-cell office:value-type="string" calcext:value-type="string">
            <text:p>Crime, Mystery &amp; Thriller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Automatic | LibraryThing | Wikipedia</text:p>
          </table:table-cell>
          <table:table-cell office:value-type="string" calcext:value-type="string">
            <text:p>not_checked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davitt_award_non_fiction</text:p>
          </table:table-cell>
          <table:table-cell office:value-type="string" calcext:value-type="string">
            <text:p>Davitt Award - Non-Fictio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s://www.librarything.com/award/2525/Davitt-Award</text:p>
          </table:table-cell>
          <table:table-cell office:value-type="string" calcext:value-type="string">
            <text:p>Crime, Mystery &amp; Thriller | Nonfiction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Automatic | LibraryThing | Wikipedia</text:p>
          </table:table-cell>
          <table:table-cell office:value-type="string" calcext:value-type="string">
            <text:p>not_checked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davitt_award_young_adult_novel</text:p>
          </table:table-cell>
          <table:table-cell office:value-type="string" calcext:value-type="string">
            <text:p>Davitt Award - Young Adult Nove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s://www.librarything.com/award/2525/Davitt-Award</text:p>
          </table:table-cell>
          <table:table-cell office:value-type="string" calcext:value-type="string">
            <text:p>Crime, Mystery &amp; Thriller | Young Adult &amp; Children's Literature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Automatic | LibraryThing | Wikipedia</text:p>
          </table:table-cell>
          <table:table-cell office:value-type="string" calcext:value-type="string">
            <text:p>not_checked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dilys_award</text:p>
          </table:table-cell>
          <table:table-cell office:value-type="string" calcext:value-type="string">
            <text:p>Dilys Award (discontinued)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s://www.librarything.com/award/593/Dilys-Award</text:p>
          </table:table-cell>
          <table:table-cell office:value-type="string" calcext:value-type="string">
            <text:p>Crime, Mystery &amp; Thriller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Automatic | LibraryThing | Wikipedia</text:p>
          </table:table-cell>
          <table:table-cell office:value-type="string" calcext:value-type="string">
            <text:p>not_checked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ditmar_collected_work</text:p>
          </table:table-cell>
          <table:table-cell office:value-type="string" calcext:value-type="string">
            <text:p>Ditmar - Collected Work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s://www.sfadb.com/Ditmar_Awards</text:p>
          </table:table-cell>
          <table:table-cell office:value-type="string" calcext:value-type="string">
            <text:p>Science Fiction | Fantasy | Regional &amp; National Awards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Automatic | SFADB | ISFDB</text:p>
          </table:table-cell>
          <table:table-cell office:value-type="string" calcext:value-type="string">
            <text:p>not_checked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ditmar_novel</text:p>
          </table:table-cell>
          <table:table-cell office:value-type="string" calcext:value-type="string">
            <text:p>Ditmar - Nove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s://www.sfadb.com/Ditmar_Awards</text:p>
          </table:table-cell>
          <table:table-cell office:value-type="string" calcext:value-type="string">
            <text:p>Science Fiction | Fantasy | Regional &amp; National Awards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Automatic | SFADB | ISFDB</text:p>
          </table:table-cell>
          <table:table-cell office:value-type="string" calcext:value-type="string">
            <text:p>not_checked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ditmar_novella_novelette</text:p>
          </table:table-cell>
          <table:table-cell office:value-type="string" calcext:value-type="string">
            <text:p>Ditmar - Novella/Novelett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s://www.sfadb.com/Ditmar_Awards</text:p>
          </table:table-cell>
          <table:table-cell office:value-type="string" calcext:value-type="string">
            <text:p>Science Fiction | Fantasy | Regional &amp; National Awards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Automatic | SFADB | ISFDB</text:p>
          </table:table-cell>
          <table:table-cell office:value-type="string" calcext:value-type="string">
            <text:p>not_checked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dragons_and_jetpacks</text:p>
          </table:table-cell>
          <table:table-cell office:value-type="string" calcext:value-type="string">
            <text:p>Dragons &amp; Jetpacks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s://www.goodreads.com/group/bookshelf/106876-dragons-jetpacks?per_page=100&amp;shelf=group-read</text:p>
          </table:table-cell>
          <table:table-cell office:value-type="string" calcext:value-type="string">
            <text:p>Online Community Book Clubs | Science Fiction | Fantasy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Checked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dublin_literary_award</text:p>
          </table:table-cell>
          <table:table-cell office:value-type="string" calcext:value-type="string">
            <text:p>Dublin Literary Awar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s://dublinliteraryaward.ie/the-library/prize-years/</text:p>
          </table:table-cell>
          <table:table-cell office:value-type="string" calcext:value-type="string">
            <text:p>Literary &amp; General Fiction | Regional &amp; National Awards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Automatic | Dublin Literary Award | Wikipedia</text:p>
          </table:table-cell>
          <table:table-cell office:value-type="string" calcext:value-type="string">
            <text:p>not_checked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edgar_award_critical_biographical_work</text:p>
          </table:table-cell>
          <table:table-cell office:value-type="string" calcext:value-type="string">
            <text:p>Edgar Award - Critical/Biographical Work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s://edgarawards.com/category-list-best-critical-biographical-work/</text:p>
          </table:table-cell>
          <table:table-cell office:value-type="string" calcext:value-type="string">
            <text:p>Crime, Mystery &amp; Thriller | Nonfiction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Automatic | Official Edgar | LibraryThing</text:p>
          </table:table-cell>
          <table:table-cell office:value-type="string" calcext:value-type="string">
            <text:p>not_checked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edgar_award_fact_crime</text:p>
          </table:table-cell>
          <table:table-cell office:value-type="string" calcext:value-type="string">
            <text:p>Edgar Award - Fact Crim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s://edgarawards.com/category-list-best-fact-crime/</text:p>
          </table:table-cell>
          <table:table-cell office:value-type="string" calcext:value-type="string">
            <text:p>Crime, Mystery &amp; Thriller | Nonfiction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Automatic | Official Edgar | LibraryThing</text:p>
          </table:table-cell>
          <table:table-cell office:value-type="string" calcext:value-type="string">
            <text:p>not_checked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edgar_award_first_novel</text:p>
          </table:table-cell>
          <table:table-cell office:value-type="string" calcext:value-type="string">
            <text:p>Edgar Award - First Nove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s://edgarawards.com/category-list-best-first-novel/</text:p>
          </table:table-cell>
          <table:table-cell office:value-type="string" calcext:value-type="string">
            <text:p>Crime, Mystery &amp; Thriller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Automatic | Official Edgar | LibraryThing</text:p>
          </table:table-cell>
          <table:table-cell office:value-type="string" calcext:value-type="string">
            <text:p>not_checked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edgar_award_juvenile</text:p>
          </table:table-cell>
          <table:table-cell office:value-type="string" calcext:value-type="string">
            <text:p>Edgar Award - Juvenil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s://edgarawards.com/category-list-best-juvenile/</text:p>
          </table:table-cell>
          <table:table-cell office:value-type="string" calcext:value-type="string">
            <text:p>Crime, Mystery &amp; Thriller | Young Adult &amp; Children's Literature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Automatic | Official Edgar | LibraryThing</text:p>
          </table:table-cell>
          <table:table-cell office:value-type="string" calcext:value-type="string">
            <text:p>not_checked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edgar_award_lilian_jackson_braun_award</text:p>
          </table:table-cell>
          <table:table-cell office:value-type="string" calcext:value-type="string">
            <text:p>Edgar Award - Lilian Jackson Braun Awar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s://edgarawards.com/category-list-lilian-jackson-braun/</text:p>
          </table:table-cell>
          <table:table-cell office:value-type="string" calcext:value-type="string">
            <text:p>Crime, Mystery &amp; Thriller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Automatic | Official Edgar | LibraryThing</text:p>
          </table:table-cell>
          <table:table-cell office:value-type="string" calcext:value-type="string">
            <text:p>not_checked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edgar_award_mary_higgins_clark_award</text:p>
          </table:table-cell>
          <table:table-cell office:value-type="string" calcext:value-type="string">
            <text:p>Edgar Award - Mary Higgins Clark Awar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s://edgarawards.com/category-list-mary-higgins-clark-award/</text:p>
          </table:table-cell>
          <table:table-cell office:value-type="string" calcext:value-type="string">
            <text:p>Crime, Mystery &amp; Thriller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Automatic | Official Edgar | LibraryThing</text:p>
          </table:table-cell>
          <table:table-cell office:value-type="string" calcext:value-type="string">
            <text:p>not_checked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edgar_award_novel</text:p>
          </table:table-cell>
          <table:table-cell office:value-type="string" calcext:value-type="string">
            <text:p>Edgar Award - Nove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s://edgarawards.com/category-list-best-novel/</text:p>
          </table:table-cell>
          <table:table-cell office:value-type="string" calcext:value-type="string">
            <text:p>Crime, Mystery &amp; Thriller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Automatic | Official Edgar | LibraryThing</text:p>
          </table:table-cell>
          <table:table-cell office:value-type="string" calcext:value-type="string">
            <text:p>not_checked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edgar_award_paperback_original</text:p>
          </table:table-cell>
          <table:table-cell office:value-type="string" calcext:value-type="string">
            <text:p>Edgar Award - Paperback Origina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s://edgarawards.com/category-list-best-paperback-original/</text:p>
          </table:table-cell>
          <table:table-cell office:value-type="string" calcext:value-type="string">
            <text:p>Crime, Mystery &amp; Thriller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Automatic | Official Edgar | LibraryThing</text:p>
          </table:table-cell>
          <table:table-cell office:value-type="string" calcext:value-type="string">
            <text:p>not_checked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edgar_award_young_adult</text:p>
          </table:table-cell>
          <table:table-cell office:value-type="string" calcext:value-type="string">
            <text:p>Edgar Award - Young Adult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s://edgarawards.com/category-list-best-young-adult/</text:p>
          </table:table-cell>
          <table:table-cell office:value-type="string" calcext:value-type="string">
            <text:p>Crime, Mystery &amp; Thriller | Young Adult &amp; Children's Literature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Automatic | Official Edgar | LibraryThing</text:p>
          </table:table-cell>
          <table:table-cell office:value-type="string" calcext:value-type="string">
            <text:p>not_checked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folio_writers_prize_book_of_the_year</text:p>
          </table:table-cell>
          <table:table-cell office:value-type="string" calcext:value-type="string">
            <text:p>Folio/Writers' Prize - Book of the Year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s://thewritersprize.com/</text:p>
          </table:table-cell>
          <table:table-cell office:value-type="string" calcext:value-type="string">
            <text:p>Regional &amp; National Awards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Automatic | The Writers' Prize | Wikipedia</text:p>
          </table:table-cell>
          <table:table-cell office:value-type="string" calcext:value-type="string">
            <text:p>not_checked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folio_writers_prize_fiction</text:p>
          </table:table-cell>
          <table:table-cell office:value-type="string" calcext:value-type="string">
            <text:p>Folio/Writers' Prize - Fictio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s://thewritersprize.com/</text:p>
          </table:table-cell>
          <table:table-cell office:value-type="string" calcext:value-type="string">
            <text:p>Literary &amp; General Fiction | Regional &amp; National Awards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Automatic | The Writers' Prize | Wikipedia</text:p>
          </table:table-cell>
          <table:table-cell office:value-type="string" calcext:value-type="string">
            <text:p>not_checked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folio_writers_prize_nonfiction</text:p>
          </table:table-cell>
          <table:table-cell office:value-type="string" calcext:value-type="string">
            <text:p>Folio/Writers' Prize - Non-Fictio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s://thewritersprize.com/</text:p>
          </table:table-cell>
          <table:table-cell office:value-type="string" calcext:value-type="string">
            <text:p>Nonfiction | Regional &amp; National Awards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Automatic | The Writers' Prize | Wikipedia</text:p>
          </table:table-cell>
          <table:table-cell office:value-type="string" calcext:value-type="string">
            <text:p>not_checked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giller_prize</text:p>
          </table:table-cell>
          <table:table-cell office:value-type="string" calcext:value-type="string">
            <text:p>Giller Priz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s://en.wikipedia.org/wiki/Giller_Prize</text:p>
          </table:table-cell>
          <table:table-cell office:value-type="string" calcext:value-type="string">
            <text:p>Literary &amp; General Fiction | Regional &amp; National Awards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not_checked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gma_book_club</text:p>
          </table:table-cell>
          <table:table-cell office:value-type="string" calcext:value-type="string">
            <text:p>GMA Book Club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s://www.goodmorningamerica.com/culture/story/shop-gma-book-club-picks-list--81520726</text:p>
          </table:table-cell>
          <table:table-cell office:value-type="string" calcext:value-type="string">
            <text:p>General Audience Book Clubs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not_checked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gma_book_club_ya</text:p>
          </table:table-cell>
          <table:table-cell office:value-type="string" calcext:value-type="string">
            <text:p>GMA Book Club YA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s://www.goodmorningamerica.com/shop/story/shop-gma-book-club-ya-picks-114243858</text:p>
          </table:table-cell>
          <table:table-cell office:value-type="string" calcext:value-type="string">
            <text:p>General Audience Book Clubs | Young Adult &amp; Children's Literature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not_checked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goldsmiths_prize</text:p>
          </table:table-cell>
          <table:table-cell office:value-type="string" calcext:value-type="string">
            <text:p>Goldsmiths Priz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s://www.gold.ac.uk/goldsmiths-prize/archive/</text:p>
          </table:table-cell>
          <table:table-cell office:value-type="string" calcext:value-type="string">
            <text:p>Literary &amp; General Fiction | Regional &amp; National Awards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Automatic | Goldsmiths | Wikipedia</text:p>
          </table:table-cell>
          <table:table-cell office:value-type="string" calcext:value-type="string">
            <text:p>not_checked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goodreads_choice_awards_audiobook</text:p>
          </table:table-cell>
          <table:table-cell office:value-type="string" calcext:value-type="string">
            <text:p>Goodreads Choice Awards - Audiobook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s://www.goodreads.com/choiceawards</text:p>
          </table:table-cell>
          <table:table-cell office:value-type="string" calcext:value-type="string">
            <text:p>Literary &amp; General Fiction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not_checked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goodreads_choice_awards_best_book</text:p>
          </table:table-cell>
          <table:table-cell office:value-type="string" calcext:value-type="string">
            <text:p>Goodreads Choice Awards - Best Book (discontinued)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s://www.goodreads.com/choiceawards</text:p>
          </table:table-cell>
          <table:table-cell office:value-type="string" calcext:value-type="string">
            <text:p>Literary &amp; General Fiction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not_checked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goodreads_choice_awards_best_of_the_best</text:p>
          </table:table-cell>
          <table:table-cell office:value-type="string" calcext:value-type="string">
            <text:p>Goodreads Choice Awards - Best of the Best (discontinued)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s://www.goodreads.com/choiceawards</text:p>
          </table:table-cell>
          <table:table-cell office:value-type="string" calcext:value-type="string">
            <text:p>Literary &amp; General Fiction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not_checked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goodreads_choice_awards_business</text:p>
          </table:table-cell>
          <table:table-cell office:value-type="string" calcext:value-type="string">
            <text:p>Goodreads Choice Awards - Business (discontinued)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s://www.goodreads.com/choiceawards</text:p>
          </table:table-cell>
          <table:table-cell office:value-type="string" calcext:value-type="string">
            <text:p>Nonfiction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not_checked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goodreads_choice_awards_chick_lit</text:p>
          </table:table-cell>
          <table:table-cell office:value-type="string" calcext:value-type="string">
            <text:p>Goodreads Choice Awards - Chick Lit (discontinued)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s://www.goodreads.com/choiceawards</text:p>
          </table:table-cell>
          <table:table-cell office:value-type="string" calcext:value-type="string">
            <text:p>Literary &amp; General Fiction | Romance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not_checked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goodreads_choice_awards_childrens_middle_grade</text:p>
          </table:table-cell>
          <table:table-cell office:value-type="string" calcext:value-type="string">
            <text:p>Goodreads Choice Awards - Children's &amp; Middle Grade (discontinued)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s://www.goodreads.com/choiceawards</text:p>
          </table:table-cell>
          <table:table-cell office:value-type="string" calcext:value-type="string">
            <text:p>Young Adult &amp; Children's Literature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not_checked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goodreads_choice_awards_debut_novel</text:p>
          </table:table-cell>
          <table:table-cell office:value-type="string" calcext:value-type="string">
            <text:p>Goodreads Choice Awards - Debut Nove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s://www.goodreads.com/choiceawards</text:p>
          </table:table-cell>
          <table:table-cell office:value-type="string" calcext:value-type="string">
            <text:p>Literary &amp; General Fiction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not_checked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goodreads_choice_awards_fantasy</text:p>
          </table:table-cell>
          <table:table-cell office:value-type="string" calcext:value-type="string">
            <text:p>Goodreads Choice Awards - Fantasy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s://www.goodreads.com/choiceawards</text:p>
          </table:table-cell>
          <table:table-cell office:value-type="string" calcext:value-type="string">
            <text:p>Fantasy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not_checked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goodreads_choice_awards_fiction</text:p>
          </table:table-cell>
          <table:table-cell office:value-type="string" calcext:value-type="string">
            <text:p>Goodreads Choice Awards - Fictio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s://www.goodreads.com/choiceawards</text:p>
          </table:table-cell>
          <table:table-cell office:value-type="string" calcext:value-type="string">
            <text:p>Literary &amp; General Fiction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not_checked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goodreads_choice_awards_food_cooking</text:p>
          </table:table-cell>
          <table:table-cell office:value-type="string" calcext:value-type="string">
            <text:p>Goodreads Choice Awards - Food &amp; Cooking (discontinued)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s://www.goodreads.com/choiceawards</text:p>
          </table:table-cell>
          <table:table-cell office:value-type="string" calcext:value-type="string">
            <text:p>Nonfiction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not_checked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goodreads_choice_awards_graphic_novels_comics</text:p>
          </table:table-cell>
          <table:table-cell office:value-type="string" calcext:value-type="string">
            <text:p>Goodreads Choice Awards - Graphic Novels &amp; Comics (discontinued)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s://www.goodreads.com/choiceawards</text:p>
          </table:table-cell>
          <table:table-cell office:value-type="string" calcext:value-type="string">
            <text:p>Literary &amp; General Fiction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not_checked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goodreads_choice_awards_historical_fiction</text:p>
          </table:table-cell>
          <table:table-cell office:value-type="string" calcext:value-type="string">
            <text:p>Goodreads Choice Awards - Historical Fictio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s://www.goodreads.com/choiceawards</text:p>
          </table:table-cell>
          <table:table-cell office:value-type="string" calcext:value-type="string">
            <text:p>Literary &amp; General Fiction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not_checked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goodreads_choice_awards_history_biography</text:p>
          </table:table-cell>
          <table:table-cell office:value-type="string" calcext:value-type="string">
            <text:p>Goodreads Choice Awards - History &amp; Biography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s://www.goodreads.com/choiceawards</text:p>
          </table:table-cell>
          <table:table-cell office:value-type="string" calcext:value-type="string">
            <text:p>Nonfiction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not_checked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goodreads_choice_awards_horror</text:p>
          </table:table-cell>
          <table:table-cell office:value-type="string" calcext:value-type="string">
            <text:p>Goodreads Choice Awards - Horror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s://www.goodreads.com/choiceawards</text:p>
          </table:table-cell>
          <table:table-cell office:value-type="string" calcext:value-type="string">
            <text:p>Horror &amp; Dark Fiction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not_checked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goodreads_choice_awards_humor</text:p>
          </table:table-cell>
          <table:table-cell office:value-type="string" calcext:value-type="string">
            <text:p>Goodreads Choice Awards - Humor (discontinued)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s://www.goodreads.com/choiceawards</text:p>
          </table:table-cell>
          <table:table-cell office:value-type="string" calcext:value-type="string">
            <text:p>Literary &amp; General Fiction | Nonfiction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not_checked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goodreads_choice_awards_memoir</text:p>
          </table:table-cell>
          <table:table-cell office:value-type="string" calcext:value-type="string">
            <text:p>Goodreads Choice Awards - Memoir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s://www.goodreads.com/choiceawards</text:p>
          </table:table-cell>
          <table:table-cell office:value-type="string" calcext:value-type="string">
            <text:p>Nonfiction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not_checked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goodreads_choice_awards_mystery_thriller</text:p>
          </table:table-cell>
          <table:table-cell office:value-type="string" calcext:value-type="string">
            <text:p>Goodreads Choice Awards - Mystery &amp; Thriller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s://www.goodreads.com/choiceawards</text:p>
          </table:table-cell>
          <table:table-cell office:value-type="string" calcext:value-type="string">
            <text:p>Crime, Mystery &amp; Thriller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not_checked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goodreads_choice_awards_nonfiction</text:p>
          </table:table-cell>
          <table:table-cell office:value-type="string" calcext:value-type="string">
            <text:p>Goodreads Choice Awards - Nonfictio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s://www.goodreads.com/choiceawards</text:p>
          </table:table-cell>
          <table:table-cell office:value-type="string" calcext:value-type="string">
            <text:p>Nonfiction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not_checked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goodreads_choice_awards_paranormal_fantasy</text:p>
          </table:table-cell>
          <table:table-cell office:value-type="string" calcext:value-type="string">
            <text:p>Goodreads Choice Awards - Paranormal Fantasy (discontinued)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s://www.goodreads.com/choiceawards</text:p>
          </table:table-cell>
          <table:table-cell office:value-type="string" calcext:value-type="string">
            <text:p>Fantasy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not_checked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goodreads_choice_awards_picture_book</text:p>
          </table:table-cell>
          <table:table-cell office:value-type="string" calcext:value-type="string">
            <text:p>Goodreads Choice Awards - Picture Book (discontinued)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s://www.goodreads.com/choiceawards</text:p>
          </table:table-cell>
          <table:table-cell office:value-type="string" calcext:value-type="string">
            <text:p>Young Adult &amp; Children's Literature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not_checked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goodreads_choice_awards_poetry</text:p>
          </table:table-cell>
          <table:table-cell office:value-type="string" calcext:value-type="string">
            <text:p>Goodreads Choice Awards - Poetry (discontinued)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s://www.goodreads.com/choiceawards</text:p>
          </table:table-cell>
          <table:table-cell office:value-type="string" calcext:value-type="string">
            <text:p>Literary &amp; General Fiction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not_checked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goodreads_choice_awards_romance</text:p>
          </table:table-cell>
          <table:table-cell office:value-type="string" calcext:value-type="string">
            <text:p>Goodreads Choice Awards - Romanc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s://www.goodreads.com/choiceawards</text:p>
          </table:table-cell>
          <table:table-cell office:value-type="string" calcext:value-type="string">
            <text:p>Romance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not_checked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goodreads_choice_awards_romantasy</text:p>
          </table:table-cell>
          <table:table-cell office:value-type="string" calcext:value-type="string">
            <text:p>Goodreads Choice Awards - Romantasy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s://www.goodreads.com/choiceawards</text:p>
          </table:table-cell>
          <table:table-cell office:value-type="string" calcext:value-type="string">
            <text:p>Romance | Fantasy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not_checked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goodreads_choice_awards_science_fiction</text:p>
          </table:table-cell>
          <table:table-cell office:value-type="string" calcext:value-type="string">
            <text:p>Goodreads Choice Awards - Science Fictio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s://www.goodreads.com/choiceawards</text:p>
          </table:table-cell>
          <table:table-cell office:value-type="string" calcext:value-type="string">
            <text:p>Science Fiction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not_checked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goodreads_choice_awards_science_technology</text:p>
          </table:table-cell>
          <table:table-cell office:value-type="string" calcext:value-type="string">
            <text:p>Goodreads Choice Awards - Science &amp; Technology (discontinued)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s://www.goodreads.com/choiceawards</text:p>
          </table:table-cell>
          <table:table-cell office:value-type="string" calcext:value-type="string">
            <text:p>Nonfiction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not_checked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goodreads_choice_awards_travel_outdoors</text:p>
          </table:table-cell>
          <table:table-cell office:value-type="string" calcext:value-type="string">
            <text:p>Goodreads Choice Awards - Travel &amp; Outdoors (discontinued)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s://www.goodreads.com/choiceawards</text:p>
          </table:table-cell>
          <table:table-cell office:value-type="string" calcext:value-type="string">
            <text:p>Nonfiction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not_checked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goodreads_choice_awards_young_adult_fantasy_science_fiction</text:p>
          </table:table-cell>
          <table:table-cell office:value-type="string" calcext:value-type="string">
            <text:p>Goodreads Choice Awards - Young Adult Fantasy &amp; Science Fictio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s://www.goodreads.com/choiceawards</text:p>
          </table:table-cell>
          <table:table-cell office:value-type="string" calcext:value-type="string">
            <text:p>Young Adult &amp; Children's Literature | Fantasy | Science Fiction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not_checked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goodreads_choice_awards_young_adult_fiction</text:p>
          </table:table-cell>
          <table:table-cell office:value-type="string" calcext:value-type="string">
            <text:p>Goodreads Choice Awards - Young Adult Fictio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s://www.goodreads.com/choiceawards</text:p>
          </table:table-cell>
          <table:table-cell office:value-type="string" calcext:value-type="string">
            <text:p>Young Adult &amp; Children's Literature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not_checked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goodreads_choice_awards_young_adult_series</text:p>
          </table:table-cell>
          <table:table-cell office:value-type="string" calcext:value-type="string">
            <text:p>Goodreads Choice Awards - Young Adult Series (discontinued)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s://www.goodreads.com/choiceawards</text:p>
          </table:table-cell>
          <table:table-cell office:value-type="string" calcext:value-type="string">
            <text:p>Young Adult &amp; Children's Literature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not_checked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governor_general_literary_award_english_fiction</text:p>
          </table:table-cell>
          <table:table-cell office:value-type="string" calcext:value-type="string">
            <text:p>Governor General's Literary Award - English Fictio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s://ggbooks.ca/past-winners-and-finalists</text:p>
          </table:table-cell>
          <table:table-cell office:value-type="string" calcext:value-type="string">
            <text:p>Literary &amp; General Fiction | Regional &amp; National Awards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not_checked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governor_general_literary_award_english_nonfiction</text:p>
          </table:table-cell>
          <table:table-cell office:value-type="string" calcext:value-type="string">
            <text:p>Governor General's Literary Award - English Non-fictio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s://ggbooks.ca/past-winners-and-finalists</text:p>
          </table:table-cell>
          <table:table-cell office:value-type="string" calcext:value-type="string">
            <text:p>Nonfiction | Regional &amp; National Awards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not_checked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governor_general_literary_award_english_young_peoples_illustrated_books</text:p>
          </table:table-cell>
          <table:table-cell office:value-type="string" calcext:value-type="string">
            <text:p>Governor General's Literary Award - English Young People's Literature - Illustrated Books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s://ggbooks.ca/past-winners-and-finalists</text:p>
          </table:table-cell>
          <table:table-cell office:value-type="string" calcext:value-type="string">
            <text:p>Young Adult &amp; Children's Literature | Regional &amp; National Awards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not_checked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governor_general_literary_award_english_young_peoples_text</text:p>
          </table:table-cell>
          <table:table-cell office:value-type="string" calcext:value-type="string">
            <text:p>Governor General's Literary Award - English Young People's Literature - Text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s://ggbooks.ca/past-winners-and-finalists</text:p>
          </table:table-cell>
          <table:table-cell office:value-type="string" calcext:value-type="string">
            <text:p>Young Adult &amp; Children's Literature | Regional &amp; National Awards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not_checked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governor_general_literary_award_french_young_peoples_illustrated_books</text:p>
          </table:table-cell>
          <table:table-cell office:value-type="string" calcext:value-type="string">
            <text:p>Governor General's Literary Award - French Young People's Literature - Illustrated Books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s://ggbooks.ca/past-winners-and-finalists</text:p>
          </table:table-cell>
          <table:table-cell office:value-type="string" calcext:value-type="string">
            <text:p>Young Adult &amp; Children's Literature | Regional &amp; National Awards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not_checked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governor_general_literary_award_french_young_peoples_text</text:p>
          </table:table-cell>
          <table:table-cell office:value-type="string" calcext:value-type="string">
            <text:p>Governor General's Literary Award - French Young People's Literature - Text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s://ggbooks.ca/past-winners-and-finalists</text:p>
          </table:table-cell>
          <table:table-cell office:value-type="string" calcext:value-type="string">
            <text:p>Young Adult &amp; Children's Literature | Regional &amp; National Awards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not_checked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gumshoe_award_european_crime_novel</text:p>
          </table:table-cell>
          <table:table-cell office:value-type="string" calcext:value-type="string">
            <text:p>Gumshoe Award - European Crime Novel (discontinued)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s://www.librarything.com/award/1785/Gumshoe-Award</text:p>
          </table:table-cell>
          <table:table-cell office:value-type="string" calcext:value-type="string">
            <text:p>Crime, Mystery &amp; Thriller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Automatic | LibraryThing | Wikipedia</text:p>
          </table:table-cell>
          <table:table-cell office:value-type="string" calcext:value-type="string">
            <text:p>not_checked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gumshoe_award_first_novel</text:p>
          </table:table-cell>
          <table:table-cell office:value-type="string" calcext:value-type="string">
            <text:p>Gumshoe Award - First Novel (discontinued)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s://www.librarything.com/award/1785/Gumshoe-Award</text:p>
          </table:table-cell>
          <table:table-cell office:value-type="string" calcext:value-type="string">
            <text:p>Crime, Mystery &amp; Thriller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Automatic | LibraryThing | Wikipedia</text:p>
          </table:table-cell>
          <table:table-cell office:value-type="string" calcext:value-type="string">
            <text:p>not_checked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gumshoe_award_mystery</text:p>
          </table:table-cell>
          <table:table-cell office:value-type="string" calcext:value-type="string">
            <text:p>Gumshoe Award - Mystery (discontinued)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s://www.librarything.com/award/1785/Gumshoe-Award</text:p>
          </table:table-cell>
          <table:table-cell office:value-type="string" calcext:value-type="string">
            <text:p>Crime, Mystery &amp; Thriller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Automatic | LibraryThing | Wikipedia</text:p>
          </table:table-cell>
          <table:table-cell office:value-type="string" calcext:value-type="string">
            <text:p>not_checked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gumshoe_award_thriller</text:p>
          </table:table-cell>
          <table:table-cell office:value-type="string" calcext:value-type="string">
            <text:p>Gumshoe Award - Thriller (discontinued)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s://www.librarything.com/award/1785/Gumshoe-Award</text:p>
          </table:table-cell>
          <table:table-cell office:value-type="string" calcext:value-type="string">
            <text:p>Crime, Mystery &amp; Thriller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Automatic | LibraryThing | Wikipedia</text:p>
          </table:table-cell>
          <table:table-cell office:value-type="string" calcext:value-type="string">
            <text:p>not_checked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hammett_prize</text:p>
          </table:table-cell>
          <table:table-cell office:value-type="string" calcext:value-type="string">
            <text:p>Hammett Priz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s://www.crimewritersna.org/hammett-prize</text:p>
          </table:table-cell>
          <table:table-cell office:value-type="string" calcext:value-type="string">
            <text:p>Crime, Mystery &amp; Thriller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Automatic | Official IACW | LibraryThing</text:p>
          </table:table-cell>
          <table:table-cell office:value-type="string" calcext:value-type="string">
            <text:p>not_checked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holt_medallion</text:p>
          </table:table-cell>
          <table:table-cell office:value-type="string" calcext:value-type="string">
            <text:p>HOLT Medallio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s://virginiaromancewriters.com/holt-medallion/</text:p>
          </table:table-cell>
          <table:table-cell office:value-type="string" calcext:value-type="string">
            <text:p>Romance | Regional &amp; National Awards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not_checked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ugo_awards_graphic_story_or_comic</text:p>
          </table:table-cell>
          <table:table-cell office:value-type="string" calcext:value-type="string">
            <text:p>Hugo Awards - Graphic Story or Comic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s://www.thehugoawards.org/hugo-history/</text:p>
          </table:table-cell>
          <table:table-cell office:value-type="string" calcext:value-type="string">
            <text:p>Science Fiction | Fantasy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not_checked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ugo_awards_novel</text:p>
          </table:table-cell>
          <table:table-cell office:value-type="string" calcext:value-type="string">
            <text:p>Hugo Awards - Nove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s://www.thehugoawards.org/hugo-history/</text:p>
          </table:table-cell>
          <table:table-cell office:value-type="string" calcext:value-type="string">
            <text:p>Science Fiction | Fantasy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not_checked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ugo_awards_novella</text:p>
          </table:table-cell>
          <table:table-cell office:value-type="string" calcext:value-type="string">
            <text:p>Hugo Awards - Novella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s://www.thehugoawards.org/hugo-history/</text:p>
          </table:table-cell>
          <table:table-cell office:value-type="string" calcext:value-type="string">
            <text:p>Science Fiction | Fantasy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not_checked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ugo_awards_related_work</text:p>
          </table:table-cell>
          <table:table-cell office:value-type="string" calcext:value-type="string">
            <text:p>Hugo Awards - Related Work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s://www.thehugoawards.org/hugo-history/</text:p>
          </table:table-cell>
          <table:table-cell office:value-type="string" calcext:value-type="string">
            <text:p>Nonfiction | Science Fiction | Fantasy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not_checked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ugo_awards_series</text:p>
          </table:table-cell>
          <table:table-cell office:value-type="string" calcext:value-type="string">
            <text:p>Hugo Awards - Series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s://www.thehugoawards.org/hugo-history/</text:p>
          </table:table-cell>
          <table:table-cell office:value-type="string" calcext:value-type="string">
            <text:p>Science Fiction | Fantasy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not_checked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hugo_girl</text:p>
          </table:table-cell>
          <table:table-cell office:value-type="string" calcext:value-type="string">
            <text:p>Hugo, Girl!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s://www.hugogirlpodcast.com/all-episodes</text:p>
          </table:table-cell>
          <table:table-cell office:value-type="string" calcext:value-type="string">
            <text:p>Online Community Book Clubs | Science Fiction | Fantasy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Automatic | Libsyn RSS | All Episodes archive</text:p>
          </table:table-cell>
          <table:table-cell office:value-type="string" calcext:value-type="string">
            <text:p>Checked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international_booker_prize</text:p>
          </table:table-cell>
          <table:table-cell office:value-type="string" calcext:value-type="string">
            <text:p>International Booker Priz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s://thebookerprizes.com/the-booker-library/prize-years</text:p>
          </table:table-cell>
          <table:table-cell office:value-type="string" calcext:value-type="string">
            <text:p>Literary &amp; General Fiction | Regional &amp; National Awards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Automatic | Official Booker | Wikipedia</text:p>
          </table:table-cell>
          <table:table-cell office:value-type="string" calcext:value-type="string">
            <text:p>not_checked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international_horror_guild_anthology</text:p>
          </table:table-cell>
          <table:table-cell office:value-type="string" calcext:value-type="string">
            <text:p>International Horror Guild - Anthology (discontinued)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s://www.horroraward.org/index.html</text:p>
          </table:table-cell>
          <table:table-cell office:value-type="string" calcext:value-type="string">
            <text:p>Horror &amp; Dark Fiction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Automatic | International Horror Guild | SFADB</text:p>
          </table:table-cell>
          <table:table-cell office:value-type="string" calcext:value-type="string">
            <text:p>not_checked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international_horror_guild_collection</text:p>
          </table:table-cell>
          <table:table-cell office:value-type="string" calcext:value-type="string">
            <text:p>International Horror Guild - Collection (discontinued)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s://www.horroraward.org/index.html</text:p>
          </table:table-cell>
          <table:table-cell office:value-type="string" calcext:value-type="string">
            <text:p>Horror &amp; Dark Fiction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Automatic | International Horror Guild | SFADB</text:p>
          </table:table-cell>
          <table:table-cell office:value-type="string" calcext:value-type="string">
            <text:p>not_checked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international_horror_guild_first_novel</text:p>
          </table:table-cell>
          <table:table-cell office:value-type="string" calcext:value-type="string">
            <text:p>International Horror Guild - First Novel (discontinued)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s://www.horroraward.org/index.html</text:p>
          </table:table-cell>
          <table:table-cell office:value-type="string" calcext:value-type="string">
            <text:p>Horror &amp; Dark Fiction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Automatic | International Horror Guild | SFADB</text:p>
          </table:table-cell>
          <table:table-cell office:value-type="string" calcext:value-type="string">
            <text:p>not_checked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international_horror_guild_illustrated_narrative</text:p>
          </table:table-cell>
          <table:table-cell office:value-type="string" calcext:value-type="string">
            <text:p>International Horror Guild - Illustrated Narrative (discontinued)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s://www.horroraward.org/index.html</text:p>
          </table:table-cell>
          <table:table-cell office:value-type="string" calcext:value-type="string">
            <text:p>Horror &amp; Dark Fiction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Automatic | International Horror Guild | SFADB</text:p>
          </table:table-cell>
          <table:table-cell office:value-type="string" calcext:value-type="string">
            <text:p>not_checked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international_horror_guild_long_fiction</text:p>
          </table:table-cell>
          <table:table-cell office:value-type="string" calcext:value-type="string">
            <text:p>International Horror Guild - Long Fiction (discontinued)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s://www.horroraward.org/index.html</text:p>
          </table:table-cell>
          <table:table-cell office:value-type="string" calcext:value-type="string">
            <text:p>Horror &amp; Dark Fiction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Automatic | International Horror Guild | SFADB</text:p>
          </table:table-cell>
          <table:table-cell office:value-type="string" calcext:value-type="string">
            <text:p>not_checked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international_horror_guild_mid_length_fiction</text:p>
          </table:table-cell>
          <table:table-cell office:value-type="string" calcext:value-type="string">
            <text:p>International Horror Guild - Mid-Length Fiction (discontinued)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s://www.horroraward.org/index.html</text:p>
          </table:table-cell>
          <table:table-cell office:value-type="string" calcext:value-type="string">
            <text:p>Horror &amp; Dark Fiction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Automatic | International Horror Guild | SFADB</text:p>
          </table:table-cell>
          <table:table-cell office:value-type="string" calcext:value-type="string">
            <text:p>not_checked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international_horror_guild_nonfiction</text:p>
          </table:table-cell>
          <table:table-cell office:value-type="string" calcext:value-type="string">
            <text:p>International Horror Guild - Non-Fiction (discontinued)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s://www.horroraward.org/index.html</text:p>
          </table:table-cell>
          <table:table-cell office:value-type="string" calcext:value-type="string">
            <text:p>Horror &amp; Dark Fiction | Nonfiction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Automatic | International Horror Guild | SFADB</text:p>
          </table:table-cell>
          <table:table-cell office:value-type="string" calcext:value-type="string">
            <text:p>not_checked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international_horror_guild_novel</text:p>
          </table:table-cell>
          <table:table-cell office:value-type="string" calcext:value-type="string">
            <text:p>International Horror Guild - Novel (discontinued)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s://www.horroraward.org/index.html</text:p>
          </table:table-cell>
          <table:table-cell office:value-type="string" calcext:value-type="string">
            <text:p>Horror &amp; Dark Fiction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Automatic | International Horror Guild | SFADB</text:p>
          </table:table-cell>
          <table:table-cell office:value-type="string" calcext:value-type="string">
            <text:p>not_checked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itw_thriller_award_audiobook</text:p>
          </table:table-cell>
          <table:table-cell office:value-type="string" calcext:value-type="string">
            <text:p>ITW Thriller Award - Audiobook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s://thrillerwriters.org/past-nominees-and-winners</text:p>
          </table:table-cell>
          <table:table-cell office:value-type="string" calcext:value-type="string">
            <text:p>Crime, Mystery &amp; Thriller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Automatic | Official ITW | LibraryThing</text:p>
          </table:table-cell>
          <table:table-cell office:value-type="string" calcext:value-type="string">
            <text:p>not_checked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itw_thriller_award_e_book_original_novel</text:p>
          </table:table-cell>
          <table:table-cell office:value-type="string" calcext:value-type="string">
            <text:p>ITW Thriller Award - E-Book Original Nove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s://thrillerwriters.org/past-nominees-and-winners</text:p>
          </table:table-cell>
          <table:table-cell office:value-type="string" calcext:value-type="string">
            <text:p>Crime, Mystery &amp; Thriller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Automatic | Official ITW | LibraryThing</text:p>
          </table:table-cell>
          <table:table-cell office:value-type="string" calcext:value-type="string">
            <text:p>not_checked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itw_thriller_award_first_novel</text:p>
          </table:table-cell>
          <table:table-cell office:value-type="string" calcext:value-type="string">
            <text:p>ITW Thriller Award - First Nove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s://thrillerwriters.org/past-nominees-and-winners</text:p>
          </table:table-cell>
          <table:table-cell office:value-type="string" calcext:value-type="string">
            <text:p>Crime, Mystery &amp; Thriller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Automatic | Official ITW | LibraryThing</text:p>
          </table:table-cell>
          <table:table-cell office:value-type="string" calcext:value-type="string">
            <text:p>not_checked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itw_thriller_award_hardcover_novel</text:p>
          </table:table-cell>
          <table:table-cell office:value-type="string" calcext:value-type="string">
            <text:p>ITW Thriller Award - Hardcover Nove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s://thrillerwriters.org/past-nominees-and-winners</text:p>
          </table:table-cell>
          <table:table-cell office:value-type="string" calcext:value-type="string">
            <text:p>Crime, Mystery &amp; Thriller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Automatic | Official ITW | LibraryThing</text:p>
          </table:table-cell>
          <table:table-cell office:value-type="string" calcext:value-type="string">
            <text:p>not_checked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itw_thriller_award_paperback_original_novel</text:p>
          </table:table-cell>
          <table:table-cell office:value-type="string" calcext:value-type="string">
            <text:p>ITW Thriller Award - Paperback Original Nove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s://thrillerwriters.org/past-nominees-and-winners</text:p>
          </table:table-cell>
          <table:table-cell office:value-type="string" calcext:value-type="string">
            <text:p>Crime, Mystery &amp; Thriller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Automatic | Official ITW | LibraryThing</text:p>
          </table:table-cell>
          <table:table-cell office:value-type="string" calcext:value-type="string">
            <text:p>not_checked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itw_thriller_award_series_novel</text:p>
          </table:table-cell>
          <table:table-cell office:value-type="string" calcext:value-type="string">
            <text:p>ITW Thriller Award - Series Nove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s://thrillerwriters.org/past-nominees-and-winners</text:p>
          </table:table-cell>
          <table:table-cell office:value-type="string" calcext:value-type="string">
            <text:p>Crime, Mystery &amp; Thriller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Automatic | Official ITW | LibraryThing</text:p>
          </table:table-cell>
          <table:table-cell office:value-type="string" calcext:value-type="string">
            <text:p>not_checked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itw_thriller_award_standalone_mystery_novel</text:p>
          </table:table-cell>
          <table:table-cell office:value-type="string" calcext:value-type="string">
            <text:p>ITW Thriller Award - Standalone Mystery Nove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s://thrillerwriters.org/past-nominees-and-winners</text:p>
          </table:table-cell>
          <table:table-cell office:value-type="string" calcext:value-type="string">
            <text:p>Crime, Mystery &amp; Thriller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Automatic | Official ITW | LibraryThing</text:p>
          </table:table-cell>
          <table:table-cell office:value-type="string" calcext:value-type="string">
            <text:p>not_checked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itw_thriller_award_standalone_thriller_novel</text:p>
          </table:table-cell>
          <table:table-cell office:value-type="string" calcext:value-type="string">
            <text:p>ITW Thriller Award - Standalone Thriller Nove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s://thrillerwriters.org/past-nominees-and-winners</text:p>
          </table:table-cell>
          <table:table-cell office:value-type="string" calcext:value-type="string">
            <text:p>Crime, Mystery &amp; Thriller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Automatic | Official ITW | LibraryThing</text:p>
          </table:table-cell>
          <table:table-cell office:value-type="string" calcext:value-type="string">
            <text:p>not_checked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itw_thriller_award_young_adult_novel</text:p>
          </table:table-cell>
          <table:table-cell office:value-type="string" calcext:value-type="string">
            <text:p>ITW Thriller Award - Young Adult Nove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s://thrillerwriters.org/past-nominees-and-winners</text:p>
          </table:table-cell>
          <table:table-cell office:value-type="string" calcext:value-type="string">
            <text:p>Crime, Mystery &amp; Thriller | Young Adult &amp; Children's Literature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Automatic | Official ITW | LibraryThing</text:p>
          </table:table-cell>
          <table:table-cell office:value-type="string" calcext:value-type="string">
            <text:p>not_checked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j_anthony_lukas_book_prize</text:p>
          </table:table-cell>
          <table:table-cell office:value-type="string" calcext:value-type="string">
            <text:p>J. Anthony Lukas Book Priz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s://journalism.columbia.edu/lukas</text:p>
          </table:table-cell>
          <table:table-cell office:value-type="string" calcext:value-type="string">
            <text:p>Nonfiction | Regional &amp; National Awards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Automatic | Official Columbia | LibraryThing | Wikipedia</text:p>
          </table:table-cell>
          <table:table-cell office:value-type="string" calcext:value-type="string">
            <text:p>not_checked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james_tait_black_biography</text:p>
          </table:table-cell>
          <table:table-cell office:value-type="string" calcext:value-type="string">
            <text:p>James Tait Black Prize - Biography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s://james-tait-black.ed.ac.uk/winners/biography</text:p>
          </table:table-cell>
          <table:table-cell office:value-type="string" calcext:value-type="string">
            <text:p>Nonfiction | Regional &amp; National Awards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not_checked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james_tait_black_fiction</text:p>
          </table:table-cell>
          <table:table-cell office:value-type="string" calcext:value-type="string">
            <text:p>James Tait Black Prize - Fictio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s://james-tait-black.ed.ac.uk/winners/fiction</text:p>
          </table:table-cell>
          <table:table-cell office:value-type="string" calcext:value-type="string">
            <text:p>Literary &amp; General Fiction | Regional &amp; National Awards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not_checked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john_newbery_medal</text:p>
          </table:table-cell>
          <table:table-cell office:value-type="string" calcext:value-type="string">
            <text:p>John Newbery Meda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s://www.ala.org/alsc/awardsgrants/bookmedia/newbery</text:p>
          </table:table-cell>
          <table:table-cell office:value-type="string" calcext:value-type="string">
            <text:p>Young Adult &amp; Children's Literature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not_checked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kirkus_prize_fiction</text:p>
          </table:table-cell>
          <table:table-cell office:value-type="string" calcext:value-type="string">
            <text:p>Kirkus Prize - Fictio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s://www.kirkusreviews.com/prize/</text:p>
          </table:table-cell>
          <table:table-cell office:value-type="string" calcext:value-type="string">
            <text:p>Literary &amp; General Fiction | Regional &amp; National Awards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not_checked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kirkus_prize_nonfiction</text:p>
          </table:table-cell>
          <table:table-cell office:value-type="string" calcext:value-type="string">
            <text:p>Kirkus Prize - Nonfictio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s://www.kirkusreviews.com/prize/</text:p>
          </table:table-cell>
          <table:table-cell office:value-type="string" calcext:value-type="string">
            <text:p>Nonfiction | Regional &amp; National Awards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not_checked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kirkus_prize_young_readers_literature</text:p>
          </table:table-cell>
          <table:table-cell office:value-type="string" calcext:value-type="string">
            <text:p>Kirkus Prize - Young Readers' Literatur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s://www.kirkusreviews.com/prize/</text:p>
          </table:table-cell>
          <table:table-cell office:value-type="string" calcext:value-type="string">
            <text:p>Young Adult &amp; Children's Literature | Regional &amp; National Awards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not_checked</text:p>
          </table:table-cell>
        </table:table-row>
        <table:table-row table:style-name="ro1">
          <table:table-cell table:number-columns-repeated="2" office:value-type="float" office:value="94" calcext:value-type="float">
            <text:p>94</text:p>
          </table:table-cell>
          <table:table-cell office:value-type="string" calcext:value-type="string">
            <text:p>ladies_of_horror_fiction_collection</text:p>
          </table:table-cell>
          <table:table-cell office:value-type="string" calcext:value-type="string">
            <text:p>Ladies of Horror Fiction - Collectio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s://www.goodreads.com/award/show/35484-ladies-of-horror-fiction-award</text:p>
          </table:table-cell>
          <table:table-cell office:value-type="string" calcext:value-type="string">
            <text:p>Horror &amp; Dark Fiction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not_checked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ladies_of_horror_fiction_debut</text:p>
          </table:table-cell>
          <table:table-cell office:value-type="string" calcext:value-type="string">
            <text:p>Ladies of Horror Fiction - Debut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s://www.goodreads.com/award/show/35484-ladies-of-horror-fiction-award</text:p>
          </table:table-cell>
          <table:table-cell office:value-type="string" calcext:value-type="string">
            <text:p>Horror &amp; Dark Fiction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not_checked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ladies_of_horror_fiction_graphic_novel</text:p>
          </table:table-cell>
          <table:table-cell office:value-type="string" calcext:value-type="string">
            <text:p>Ladies of Horror Fiction - Graphic Nove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s://www.goodreads.com/award/show/35484-ladies-of-horror-fiction-award</text:p>
          </table:table-cell>
          <table:table-cell office:value-type="string" calcext:value-type="string">
            <text:p>Horror &amp; Dark Fiction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not_checked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ladies_of_horror_fiction_middle_grade</text:p>
          </table:table-cell>
          <table:table-cell office:value-type="string" calcext:value-type="string">
            <text:p>Ladies of Horror Fiction - Middle Grad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s://www.goodreads.com/award/show/35484-ladies-of-horror-fiction-award</text:p>
          </table:table-cell>
          <table:table-cell office:value-type="string" calcext:value-type="string">
            <text:p>Horror &amp; Dark Fiction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not_checked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ladies_of_horror_fiction_novel</text:p>
          </table:table-cell>
          <table:table-cell office:value-type="string" calcext:value-type="string">
            <text:p>Ladies of Horror Fiction - Nove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s://www.goodreads.com/award/show/35484-ladies-of-horror-fiction-award</text:p>
          </table:table-cell>
          <table:table-cell office:value-type="string" calcext:value-type="string">
            <text:p>Horror &amp; Dark Fiction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not_checked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ladies_of_horror_fiction_novella</text:p>
          </table:table-cell>
          <table:table-cell office:value-type="string" calcext:value-type="string">
            <text:p>Ladies of Horror Fiction - Novella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s://www.goodreads.com/award/show/35484-ladies-of-horror-fiction-award</text:p>
          </table:table-cell>
          <table:table-cell office:value-type="string" calcext:value-type="string">
            <text:p>Horror &amp; Dark Fiction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not_checked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ladies_of_horror_fiction_poetry_collection</text:p>
          </table:table-cell>
          <table:table-cell office:value-type="string" calcext:value-type="string">
            <text:p>Ladies of Horror Fiction - Poetry Collectio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s://www.goodreads.com/award/show/35484-ladies-of-horror-fiction-award</text:p>
          </table:table-cell>
          <table:table-cell office:value-type="string" calcext:value-type="string">
            <text:p>Horror &amp; Dark Fiction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not_checked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ladies_of_horror_fiction_young_adult</text:p>
          </table:table-cell>
          <table:table-cell office:value-type="string" calcext:value-type="string">
            <text:p>Ladies of Horror Fiction - Young Adult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s://www.goodreads.com/award/show/35484-ladies-of-horror-fiction-award</text:p>
          </table:table-cell>
          <table:table-cell office:value-type="string" calcext:value-type="string">
            <text:p>Horror &amp; Dark Fiction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not_checked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lambda_literary_awards_romance</text:p>
          </table:table-cell>
          <table:table-cell office:value-type="string" calcext:value-type="string">
            <text:p>Lambda Literary Awards - Romance Categories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s://lambdaliterary.org/awards/lammys-directory-1988-present/</text:p>
          </table:table-cell>
          <table:table-cell office:value-type="string" calcext:value-type="string">
            <text:p>Romance | Literary &amp; General Fiction | Regional &amp; National Awards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not_checked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lefty_award_debut_mystery_novel</text:p>
          </table:table-cell>
          <table:table-cell office:value-type="string" calcext:value-type="string">
            <text:p>Lefty Award - Debut Mystery Nove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s://www.stopyourekillingme.com/Awards/Lefty_Awards.html</text:p>
          </table:table-cell>
          <table:table-cell office:value-type="string" calcext:value-type="string">
            <text:p>Crime, Mystery &amp; Thriller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Automatic | Stop, You're Killing Me | LibraryThing</text:p>
          </table:table-cell>
          <table:table-cell office:value-type="string" calcext:value-type="string">
            <text:p>not_checked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lefty_award_historical_mystery_novel</text:p>
          </table:table-cell>
          <table:table-cell office:value-type="string" calcext:value-type="string">
            <text:p>Lefty Award - Historical Mystery Nove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s://www.stopyourekillingme.com/Awards/Lefty_Awards.html</text:p>
          </table:table-cell>
          <table:table-cell office:value-type="string" calcext:value-type="string">
            <text:p>Crime, Mystery &amp; Thriller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Automatic | Stop, You're Killing Me | LibraryThing</text:p>
          </table:table-cell>
          <table:table-cell office:value-type="string" calcext:value-type="string">
            <text:p>not_checked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lefty_award_humorous_mystery_novel</text:p>
          </table:table-cell>
          <table:table-cell office:value-type="string" calcext:value-type="string">
            <text:p>Lefty Award - Humorous Mystery Nove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s://www.stopyourekillingme.com/Awards/Lefty_Awards.html</text:p>
          </table:table-cell>
          <table:table-cell office:value-type="string" calcext:value-type="string">
            <text:p>Crime, Mystery &amp; Thriller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Automatic | Stop, You're Killing Me | LibraryThing</text:p>
          </table:table-cell>
          <table:table-cell office:value-type="string" calcext:value-type="string">
            <text:p>not_checked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lefty_award_mystery_novel</text:p>
          </table:table-cell>
          <table:table-cell office:value-type="string" calcext:value-type="string">
            <text:p>Lefty Award - Mystery Nove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s://www.stopyourekillingme.com/Awards/Lefty_Awards.html</text:p>
          </table:table-cell>
          <table:table-cell office:value-type="string" calcext:value-type="string">
            <text:p>Crime, Mystery &amp; Thriller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Automatic | Stop, You're Killing Me | LibraryThing</text:p>
          </table:table-cell>
          <table:table-cell office:value-type="string" calcext:value-type="string">
            <text:p>not_checked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libby_reads_global</text:p>
          </table:table-cell>
          <table:table-cell office:value-type="string" calcext:value-type="string">
            <text:p>Libby Reads Globa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s://www.libbylife.com/libby-reads</text:p>
          </table:table-cell>
          <table:table-cell office:value-type="string" calcext:value-type="string">
            <text:p>Online Community Book Clubs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Checked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library_reads</text:p>
          </table:table-cell>
          <table:table-cell office:value-type="string" calcext:value-type="string">
            <text:p>LibraryReads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s://libraryreads.org/archive</text:p>
          </table:table-cell>
          <table:table-cell office:value-type="string" calcext:value-type="string">
            <text:p>General Audience Book Clubs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not_checked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library_reads_bonus_picks</text:p>
          </table:table-cell>
          <table:table-cell office:value-type="string" calcext:value-type="string">
            <text:p>LibraryReads - Bonus Picks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s://libraryreads.org/archive</text:p>
          </table:table-cell>
          <table:table-cell office:value-type="string" calcext:value-type="string">
            <text:p>General Audience Book Clubs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not_checked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ibrary_reads_notable_nonfiction</text:p>
          </table:table-cell>
          <table:table-cell office:value-type="string" calcext:value-type="string">
            <text:p>LibraryReads - Notable Nonfictio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s://libraryreads.org/archive</text:p>
          </table:table-cell>
          <table:table-cell office:value-type="string" calcext:value-type="string">
            <text:p>General Audience Book Clubs | Nonfiction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not_checked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locus_all_time_1975_novel</text:p>
          </table:table-cell>
          <table:table-cell office:value-type="string" calcext:value-type="string">
            <text:p>Locus - All-Time 1975 Nove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s://www.sfadb.com/Locus_1975</text:p>
          </table:table-cell>
          <table:table-cell office:value-type="string" calcext:value-type="string">
            <text:p>Science Fiction | Fantasy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not_checked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locus_all_time_1987_fantasy_novel</text:p>
          </table:table-cell>
          <table:table-cell office:value-type="string" calcext:value-type="string">
            <text:p>Locus - All-Time 1987 Fantasy Nove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s://www.sfadb.com/Locus_1987_Fantasy</text:p>
          </table:table-cell>
          <table:table-cell office:value-type="string" calcext:value-type="string">
            <text:p>Fantasy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not_checked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locus_all_time_1987_sf_novel</text:p>
          </table:table-cell>
          <table:table-cell office:value-type="string" calcext:value-type="string">
            <text:p>Locus - All-Time 1987 SF Nove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s://www.sfadb.com/Locus_1987_SF</text:p>
          </table:table-cell>
          <table:table-cell office:value-type="string" calcext:value-type="string">
            <text:p>Science Fiction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not_checked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locus_all_time_1998_fantasy_novel</text:p>
          </table:table-cell>
          <table:table-cell office:value-type="string" calcext:value-type="string">
            <text:p>Locus - All-Time 1998 Fantasy Nove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s://www.sfadb.com/Locus_1998_Fantasy</text:p>
          </table:table-cell>
          <table:table-cell office:value-type="string" calcext:value-type="string">
            <text:p>Fantasy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not_checked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locus_all_time_1998_sf_novel</text:p>
          </table:table-cell>
          <table:table-cell office:value-type="string" calcext:value-type="string">
            <text:p>Locus - All-Time 1998 SF Nove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s://www.sfadb.com/Locus_1998_SF</text:p>
          </table:table-cell>
          <table:table-cell office:value-type="string" calcext:value-type="string">
            <text:p>Science Fiction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not_checked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locus_all_time_2012_fh_20th_novel</text:p>
          </table:table-cell>
          <table:table-cell office:value-type="string" calcext:value-type="string">
            <text:p>Locus - All-Time 2012 20th Century Fantasy/Horror Nove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s://www.sfadb.com/Locus_2012_FH20th</text:p>
          </table:table-cell>
          <table:table-cell office:value-type="string" calcext:value-type="string">
            <text:p>Fantasy | Horror &amp; Dark Fiction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not_checked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locus_all_time_2012_fh_21st_novel</text:p>
          </table:table-cell>
          <table:table-cell office:value-type="string" calcext:value-type="string">
            <text:p>Locus - All-Time 2012 21st Century Fantasy/Horror Nove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s://www.sfadb.com/Locus_2012_FH21st</text:p>
          </table:table-cell>
          <table:table-cell office:value-type="string" calcext:value-type="string">
            <text:p>Fantasy | Horror &amp; Dark Fiction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not_checked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locus_all_time_2012_sf_20th_novel</text:p>
          </table:table-cell>
          <table:table-cell office:value-type="string" calcext:value-type="string">
            <text:p>Locus - All-Time 2012 20th Century SF Nove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s://www.sfadb.com/Locus_2012_SF20th</text:p>
          </table:table-cell>
          <table:table-cell office:value-type="string" calcext:value-type="string">
            <text:p>Science Fiction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not_checked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locus_all_time_2012_sf_21st_novel</text:p>
          </table:table-cell>
          <table:table-cell office:value-type="string" calcext:value-type="string">
            <text:p>Locus - All-Time 2012 21st Century SF Nove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s://www.sfadb.com/Locus_2012_SF21st</text:p>
          </table:table-cell>
          <table:table-cell office:value-type="string" calcext:value-type="string">
            <text:p>Science Fiction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not_checked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locus_annual_anthology</text:p>
          </table:table-cell>
          <table:table-cell office:value-type="string" calcext:value-type="string">
            <text:p>Locus - Annual Anthology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s://www.sfadb.com/Locus_Awards</text:p>
          </table:table-cell>
          <table:table-cell office:value-type="string" calcext:value-type="string">
            <text:p>Science Fiction | Fantasy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Automatic | SFADB | ISFDB</text:p>
          </table:table-cell>
          <table:table-cell office:value-type="string" calcext:value-type="string">
            <text:p>not_checked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locus_annual_collection</text:p>
          </table:table-cell>
          <table:table-cell office:value-type="string" calcext:value-type="string">
            <text:p>Locus - Annual Collectio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s://www.sfadb.com/Locus_Awards</text:p>
          </table:table-cell>
          <table:table-cell office:value-type="string" calcext:value-type="string">
            <text:p>Science Fiction | Fantasy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Automatic | SFADB | ISFDB</text:p>
          </table:table-cell>
          <table:table-cell office:value-type="string" calcext:value-type="string">
            <text:p>not_checked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locus_annual_fantasy_novel</text:p>
          </table:table-cell>
          <table:table-cell office:value-type="string" calcext:value-type="string">
            <text:p>Locus - Annual Fantasy Nove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s://www.sfadb.com/Locus_Awards</text:p>
          </table:table-cell>
          <table:table-cell office:value-type="string" calcext:value-type="string">
            <text:p>Fantasy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Automatic | SFADB | ISFDB</text:p>
          </table:table-cell>
          <table:table-cell office:value-type="string" calcext:value-type="string">
            <text:p>not_checked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locus_annual_first_novel</text:p>
          </table:table-cell>
          <table:table-cell office:value-type="string" calcext:value-type="string">
            <text:p>Locus - Annual First Nove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s://www.sfadb.com/Locus_Awards</text:p>
          </table:table-cell>
          <table:table-cell office:value-type="string" calcext:value-type="string">
            <text:p>Science Fiction | Fantasy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Automatic | SFADB | ISFDB</text:p>
          </table:table-cell>
          <table:table-cell office:value-type="string" calcext:value-type="string">
            <text:p>not_checked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locus_annual_horror_novel</text:p>
          </table:table-cell>
          <table:table-cell office:value-type="string" calcext:value-type="string">
            <text:p>Locus - Annual Horror Nove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s://www.sfadb.com/Locus_Awards</text:p>
          </table:table-cell>
          <table:table-cell office:value-type="string" calcext:value-type="string">
            <text:p>Horror &amp; Dark Fiction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Automatic | SFADB | ISFDB</text:p>
          </table:table-cell>
          <table:table-cell office:value-type="string" calcext:value-type="string">
            <text:p>not_checked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locus_annual_illustrated_and_art_book</text:p>
          </table:table-cell>
          <table:table-cell office:value-type="string" calcext:value-type="string">
            <text:p>Locus - Annual Illustrated and Art Book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s://www.sfadb.com/Locus_Awards</text:p>
          </table:table-cell>
          <table:table-cell office:value-type="string" calcext:value-type="string">
            <text:p>Nonfiction | Science Fiction | Fantasy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not_checked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locus_annual_nonfiction</text:p>
          </table:table-cell>
          <table:table-cell office:value-type="string" calcext:value-type="string">
            <text:p>Locus - Annual Non-Fictio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s://www.sfadb.com/Locus_Awards</text:p>
          </table:table-cell>
          <table:table-cell office:value-type="string" calcext:value-type="string">
            <text:p>Nonfiction | Science Fiction | Fantasy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not_checked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locus_annual_novella</text:p>
          </table:table-cell>
          <table:table-cell office:value-type="string" calcext:value-type="string">
            <text:p>Locus - Annual Novella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s://www.sfadb.com/Locus_Awards</text:p>
          </table:table-cell>
          <table:table-cell office:value-type="string" calcext:value-type="string">
            <text:p>Science Fiction | Fantasy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Automatic | SFADB | ISFDB</text:p>
          </table:table-cell>
          <table:table-cell office:value-type="string" calcext:value-type="string">
            <text:p>not_checked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locus_annual_sf_novel</text:p>
          </table:table-cell>
          <table:table-cell office:value-type="string" calcext:value-type="string">
            <text:p>Locus - Annual SF Nove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s://www.sfadb.com/Locus_Awards</text:p>
          </table:table-cell>
          <table:table-cell office:value-type="string" calcext:value-type="string">
            <text:p>Science Fiction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Automatic | SFADB | ISFDB</text:p>
          </table:table-cell>
          <table:table-cell office:value-type="string" calcext:value-type="string">
            <text:p>not_checked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locus_annual_translated_novel</text:p>
          </table:table-cell>
          <table:table-cell office:value-type="string" calcext:value-type="string">
            <text:p>Locus - Annual Translated Nove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s://www.sfadb.com/Locus_Awards</text:p>
          </table:table-cell>
          <table:table-cell office:value-type="string" calcext:value-type="string">
            <text:p>Science Fiction | Fantasy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not_checked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locus_annual_young_adult_novel</text:p>
          </table:table-cell>
          <table:table-cell office:value-type="string" calcext:value-type="string">
            <text:p>Locus - Annual Young Adult Nove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s://www.sfadb.com/Locus_Awards</text:p>
          </table:table-cell>
          <table:table-cell office:value-type="string" calcext:value-type="string">
            <text:p>Young Adult &amp; Children's Literature | Science Fiction | Fantasy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not_checked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destar_award_young_adult_book</text:p>
          </table:table-cell>
          <table:table-cell office:value-type="string" calcext:value-type="string">
            <text:p>Lodestar Award - Young Adult Book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s://www.thehugoawards.org/hugo-history/</text:p>
          </table:table-cell>
          <table:table-cell office:value-type="string" calcext:value-type="string">
            <text:p>Young Adult &amp; Children's Literature | Science Fiction | Fantasy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not_checked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macavity_award_first_mystery</text:p>
          </table:table-cell>
          <table:table-cell office:value-type="string" calcext:value-type="string">
            <text:p>Macavity Award - First Mystery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s://mysteryreaders.org/macavity-awards/</text:p>
          </table:table-cell>
          <table:table-cell office:value-type="string" calcext:value-type="string">
            <text:p>Crime, Mystery &amp; Thriller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Automatic | Official Macavity | Stop, You're Killing Me | LibraryThing</text:p>
          </table:table-cell>
          <table:table-cell office:value-type="string" calcext:value-type="string">
            <text:p>not_checked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macavity_award_historical_mystery</text:p>
          </table:table-cell>
          <table:table-cell office:value-type="string" calcext:value-type="string">
            <text:p>Macavity Award - Historical Mystery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s://mysteryreaders.org/macavity-awards/</text:p>
          </table:table-cell>
          <table:table-cell office:value-type="string" calcext:value-type="string">
            <text:p>Crime, Mystery &amp; Thriller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Automatic | Official Macavity | Stop, You're Killing Me | LibraryThing</text:p>
          </table:table-cell>
          <table:table-cell office:value-type="string" calcext:value-type="string">
            <text:p>not_checked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macavity_award_mystery_novel</text:p>
          </table:table-cell>
          <table:table-cell office:value-type="string" calcext:value-type="string">
            <text:p>Macavity Award - Mystery Nove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s://mysteryreaders.org/macavity-awards/</text:p>
          </table:table-cell>
          <table:table-cell office:value-type="string" calcext:value-type="string">
            <text:p>Crime, Mystery &amp; Thriller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Automatic | Official Macavity | Stop, You're Killing Me | LibraryThing</text:p>
          </table:table-cell>
          <table:table-cell office:value-type="string" calcext:value-type="string">
            <text:p>not_checked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macavity_award_nonfiction_critical</text:p>
          </table:table-cell>
          <table:table-cell office:value-type="string" calcext:value-type="string">
            <text:p>Macavity Award - Nonfiction/Critica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s://mysteryreaders.org/macavity-awards/</text:p>
          </table:table-cell>
          <table:table-cell office:value-type="string" calcext:value-type="string">
            <text:p>Crime, Mystery &amp; Thriller | Nonfiction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Automatic | Official Macavity | Stop, You're Killing Me | LibraryThing</text:p>
          </table:table-cell>
          <table:table-cell office:value-type="string" calcext:value-type="string">
            <text:p>not_checked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mark_lynton_history_prize</text:p>
          </table:table-cell>
          <table:table-cell office:value-type="string" calcext:value-type="string">
            <text:p>Mark Lynton History Priz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s://journalism.columbia.edu/lukas</text:p>
          </table:table-cell>
          <table:table-cell office:value-type="string" calcext:value-type="string">
            <text:p>Nonfiction | Regional &amp; National Awards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Automatic | Official Columbia | Wikipedia</text:p>
          </table:table-cell>
          <table:table-cell office:value-type="string" calcext:value-type="string">
            <text:p>not_checked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michael_l_printz_award</text:p>
          </table:table-cell>
          <table:table-cell office:value-type="string" calcext:value-type="string">
            <text:p>Michael L. Printz Awar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s://www.ala.org/yalsa/booklistsawards/bookawards/printzaward/previouswinners/winners</text:p>
          </table:table-cell>
          <table:table-cell office:value-type="string" calcext:value-type="string">
            <text:p>Young Adult &amp; Children's Literature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not_checked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miles_franklin_literary_award</text:p>
          </table:table-cell>
          <table:table-cell office:value-type="string" calcext:value-type="string">
            <text:p>Miles Franklin Literary Awar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s://en.wikipedia.org/wiki/Miles_Franklin_Award</text:p>
          </table:table-cell>
          <table:table-cell office:value-type="string" calcext:value-type="string">
            <text:p>Literary &amp; General Fiction | Regional &amp; National Awards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not_checked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mythopoeic_adult_literature</text:p>
          </table:table-cell>
          <table:table-cell office:value-type="string" calcext:value-type="string">
            <text:p>Mythopoeic - Adult Literatur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s://www.sfadb.com/Mythopoeic_Awards</text:p>
          </table:table-cell>
          <table:table-cell office:value-type="string" calcext:value-type="string">
            <text:p>Fantasy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not_checked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mythopoeic_childrens_literature</text:p>
          </table:table-cell>
          <table:table-cell office:value-type="string" calcext:value-type="string">
            <text:p>Mythopoeic - Children's Literatur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s://www.sfadb.com/Mythopoeic_Awards</text:p>
          </table:table-cell>
          <table:table-cell office:value-type="string" calcext:value-type="string">
            <text:p>Young Adult &amp; Children's Literature | Fantasy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not_checked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mythopoeic_fantasy</text:p>
          </table:table-cell>
          <table:table-cell office:value-type="string" calcext:value-type="string">
            <text:p>Mythopoeic - Fantasy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s://www.sfadb.com/Mythopoeic_Awards</text:p>
          </table:table-cell>
          <table:table-cell office:value-type="string" calcext:value-type="string">
            <text:p>Young Adult &amp; Children's Literature | Fantasy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not_checked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mythopoeic_young_adult_literature</text:p>
          </table:table-cell>
          <table:table-cell office:value-type="string" calcext:value-type="string">
            <text:p>Mythopoeic - Young Adult Literatur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s://www.sfadb.com/Mythopoeic_Awards</text:p>
          </table:table-cell>
          <table:table-cell office:value-type="string" calcext:value-type="string">
            <text:p>Young Adult &amp; Children's Literature | Fantasy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not_checked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national_book_award_fiction</text:p>
          </table:table-cell>
          <table:table-cell office:value-type="string" calcext:value-type="string">
            <text:p>National Book Award - Fictio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s://www.nationalbook.org/national-book-awards/years/</text:p>
          </table:table-cell>
          <table:table-cell office:value-type="string" calcext:value-type="string">
            <text:p>Literary &amp; General Fiction | Regional &amp; National Awards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Automatic | Official National Book Foundation | Wikipedia</text:p>
          </table:table-cell>
          <table:table-cell office:value-type="string" calcext:value-type="string">
            <text:p>not_checked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national_book_award_nonfiction</text:p>
          </table:table-cell>
          <table:table-cell office:value-type="string" calcext:value-type="string">
            <text:p>National Book Award - Nonfictio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s://www.nationalbook.org/national-book-awards/years/</text:p>
          </table:table-cell>
          <table:table-cell office:value-type="string" calcext:value-type="string">
            <text:p>Nonfiction | Regional &amp; National Awards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Automatic | Official National Book Foundation | Wikipedia</text:p>
          </table:table-cell>
          <table:table-cell office:value-type="string" calcext:value-type="string">
            <text:p>not_checked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national_book_award_young_peoples_literature</text:p>
          </table:table-cell>
          <table:table-cell office:value-type="string" calcext:value-type="string">
            <text:p>National Book Award - Young People's Literatur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s://www.nationalbook.org/national-book-awards/years/</text:p>
          </table:table-cell>
          <table:table-cell office:value-type="string" calcext:value-type="string">
            <text:p>Young Adult &amp; Children's Literature | Regional &amp; National Awards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Automatic | Official National Book Foundation | Wikipedia</text:p>
          </table:table-cell>
          <table:table-cell office:value-type="string" calcext:value-type="string">
            <text:p>not_checked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national_book_critics_circle_biography</text:p>
          </table:table-cell>
          <table:table-cell office:value-type="string" calcext:value-type="string">
            <text:p>National Book Critics Circle Award - Biography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s://www.bookcritics.org/past-awards/</text:p>
          </table:table-cell>
          <table:table-cell office:value-type="string" calcext:value-type="string">
            <text:p>Nonfiction | Regional &amp; National Awards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Automatic | NBCC | Wikipedia</text:p>
          </table:table-cell>
          <table:table-cell office:value-type="string" calcext:value-type="string">
            <text:p>not_checked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national_book_critics_circle_criticism</text:p>
          </table:table-cell>
          <table:table-cell office:value-type="string" calcext:value-type="string">
            <text:p>National Book Critics Circle Award - Criticism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s://www.bookcritics.org/past-awards/</text:p>
          </table:table-cell>
          <table:table-cell office:value-type="string" calcext:value-type="string">
            <text:p>Nonfiction | Regional &amp; National Awards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Automatic | NBCC | Wikipedia</text:p>
          </table:table-cell>
          <table:table-cell office:value-type="string" calcext:value-type="string">
            <text:p>not_checked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national_book_critics_circle_fiction</text:p>
          </table:table-cell>
          <table:table-cell office:value-type="string" calcext:value-type="string">
            <text:p>National Book Critics Circle Award - Fictio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s://www.bookcritics.org/past-awards/</text:p>
          </table:table-cell>
          <table:table-cell office:value-type="string" calcext:value-type="string">
            <text:p>Literary &amp; General Fiction | Regional &amp; National Awards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Automatic | NBCC | Wikipedia</text:p>
          </table:table-cell>
          <table:table-cell office:value-type="string" calcext:value-type="string">
            <text:p>not_checked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national_book_critics_circle_gregg_barrios_translation</text:p>
          </table:table-cell>
          <table:table-cell office:value-type="string" calcext:value-type="string">
            <text:p>National Book Critics Circle Award - Gregg Barrios Book in Translation Priz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s://www.bookcritics.org/past-awards/</text:p>
          </table:table-cell>
          <table:table-cell office:value-type="string" calcext:value-type="string">
            <text:p>Regional &amp; National Awards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Automatic | NBCC | Wikipedia</text:p>
          </table:table-cell>
          <table:table-cell office:value-type="string" calcext:value-type="string">
            <text:p>not_checked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national_book_critics_circle_john_leonard</text:p>
          </table:table-cell>
          <table:table-cell office:value-type="string" calcext:value-type="string">
            <text:p>National Book Critics Circle Award - John Leonard Priz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s://www.bookcritics.org/past-awards/</text:p>
          </table:table-cell>
          <table:table-cell office:value-type="string" calcext:value-type="string">
            <text:p>Regional &amp; National Awards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Automatic | NBCC | Wikipedia</text:p>
          </table:table-cell>
          <table:table-cell office:value-type="string" calcext:value-type="string">
            <text:p>not_checked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national_book_critics_circle_memoir_autobiography</text:p>
          </table:table-cell>
          <table:table-cell office:value-type="string" calcext:value-type="string">
            <text:p>National Book Critics Circle Award - Memoir/Autobiography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s://www.bookcritics.org/past-awards/</text:p>
          </table:table-cell>
          <table:table-cell office:value-type="string" calcext:value-type="string">
            <text:p>Nonfiction | Regional &amp; National Awards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Automatic | NBCC | Wikipedia</text:p>
          </table:table-cell>
          <table:table-cell office:value-type="string" calcext:value-type="string">
            <text:p>not_checked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national_book_critics_circle_nonfiction</text:p>
          </table:table-cell>
          <table:table-cell office:value-type="string" calcext:value-type="string">
            <text:p>National Book Critics Circle Award - Nonfictio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s://www.bookcritics.org/past-awards/</text:p>
          </table:table-cell>
          <table:table-cell office:value-type="string" calcext:value-type="string">
            <text:p>Nonfiction | Regional &amp; National Awards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Automatic | NBCC | Wikipedia</text:p>
          </table:table-cell>
          <table:table-cell office:value-type="string" calcext:value-type="string">
            <text:p>not_checked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national_book_critics_circle_poetry</text:p>
          </table:table-cell>
          <table:table-cell office:value-type="string" calcext:value-type="string">
            <text:p>National Book Critics Circle Award - Poetry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s://www.bookcritics.org/past-awards/</text:p>
          </table:table-cell>
          <table:table-cell office:value-type="string" calcext:value-type="string">
            <text:p>Regional &amp; National Awards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Automatic | NBCC | Wikipedia</text:p>
          </table:table-cell>
          <table:table-cell office:value-type="string" calcext:value-type="string">
            <text:p>not_checked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ebula_andre_norton_middle_grade_young_adult</text:p>
          </table:table-cell>
          <table:table-cell office:value-type="string" calcext:value-type="string">
            <text:p>Nebula Awards - Andre Norton Middle Grade/YA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s://nebulas.sfwa.org/award/andre-norton-award/</text:p>
          </table:table-cell>
          <table:table-cell office:value-type="string" calcext:value-type="string">
            <text:p>Young Adult &amp; Children's Literature | Science Fiction | Fantasy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Automatic | Official SFWA | SFADB</text:p>
          </table:table-cell>
          <table:table-cell office:value-type="string" calcext:value-type="string">
            <text:p>not_checked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ebula_awards_comics</text:p>
          </table:table-cell>
          <table:table-cell office:value-type="string" calcext:value-type="string">
            <text:p>Nebula Awards - Comics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s://www.sfadb.com/Nebula_Awards</text:p>
          </table:table-cell>
          <table:table-cell office:value-type="string" calcext:value-type="string">
            <text:p>Science Fiction | Fantasy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not_checked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ebula_awards_novel</text:p>
          </table:table-cell>
          <table:table-cell office:value-type="string" calcext:value-type="string">
            <text:p>Nebula Awards - Nove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s://nebulas.sfwa.org/award/best-novel/</text:p>
          </table:table-cell>
          <table:table-cell office:value-type="string" calcext:value-type="string">
            <text:p>Science Fiction | Fantasy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Automatic | Official SFWA | SFADB</text:p>
          </table:table-cell>
          <table:table-cell office:value-type="string" calcext:value-type="string">
            <text:p>not_checked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ebula_awards_novella</text:p>
          </table:table-cell>
          <table:table-cell office:value-type="string" calcext:value-type="string">
            <text:p>Nebula Awards - Novella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s://www.sfadb.com/Nebula_Awards</text:p>
          </table:table-cell>
          <table:table-cell office:value-type="string" calcext:value-type="string">
            <text:p>Science Fiction | Fantasy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not_checked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ned_kelly_award_crime_fiction</text:p>
          </table:table-cell>
          <table:table-cell office:value-type="string" calcext:value-type="string">
            <text:p>Ned Kelly Award - Crime Fictio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s://www.librarything.com/award/2492/Ned-Kelly-Award</text:p>
          </table:table-cell>
          <table:table-cell office:value-type="string" calcext:value-type="string">
            <text:p>Crime, Mystery &amp; Thriller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Automatic | LibraryThing | Wikipedia</text:p>
          </table:table-cell>
          <table:table-cell office:value-type="string" calcext:value-type="string">
            <text:p>not_checked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ned_kelly_award_debut_crime_fiction</text:p>
          </table:table-cell>
          <table:table-cell office:value-type="string" calcext:value-type="string">
            <text:p>Ned Kelly Award - Debut Crime Fictio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s://www.librarything.com/award/2492/Ned-Kelly-Award</text:p>
          </table:table-cell>
          <table:table-cell office:value-type="string" calcext:value-type="string">
            <text:p>Crime, Mystery &amp; Thriller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Automatic | LibraryThing | Wikipedia</text:p>
          </table:table-cell>
          <table:table-cell office:value-type="string" calcext:value-type="string">
            <text:p>not_checked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ned_kelly_award_international_crime_fiction</text:p>
          </table:table-cell>
          <table:table-cell office:value-type="string" calcext:value-type="string">
            <text:p>Ned Kelly Award - International Crime Fictio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s://www.librarything.com/award/2492/Ned-Kelly-Award</text:p>
          </table:table-cell>
          <table:table-cell office:value-type="string" calcext:value-type="string">
            <text:p>Crime, Mystery &amp; Thriller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Automatic | LibraryThing | Wikipedia</text:p>
          </table:table-cell>
          <table:table-cell office:value-type="string" calcext:value-type="string">
            <text:p>not_checked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ned_kelly_award_true_crime</text:p>
          </table:table-cell>
          <table:table-cell office:value-type="string" calcext:value-type="string">
            <text:p>Ned Kelly Award - True Crim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s://www.librarything.com/award/2492/Ned-Kelly-Award</text:p>
          </table:table-cell>
          <table:table-cell office:value-type="string" calcext:value-type="string">
            <text:p>Crime, Mystery &amp; Thriller | Nonfiction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Automatic | LibraryThing | Wikipedia</text:p>
          </table:table-cell>
          <table:table-cell office:value-type="string" calcext:value-type="string">
            <text:p>not_checked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nero_award</text:p>
          </table:table-cell>
          <table:table-cell office:value-type="string" calcext:value-type="string">
            <text:p>Nero Awar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s://wp.nerowolfe.org/htm/literary_awards/nero_award/Nero_Award_Finalists.htm</text:p>
          </table:table-cell>
          <table:table-cell office:value-type="string" calcext:value-type="string">
            <text:p>Crime, Mystery &amp; Thriller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Automatic | Official Wolfe Pack | LibraryThing | Wikipedia</text:p>
          </table:table-cell>
          <table:table-cell office:value-type="string" calcext:value-type="string">
            <text:p>not_checked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nero_book_awards_childrens_fiction</text:p>
          </table:table-cell>
          <table:table-cell office:value-type="string" calcext:value-type="string">
            <text:p>Nero Book Awards - Children's Fictio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s://nerobookawards.com/key-dates/</text:p>
          </table:table-cell>
          <table:table-cell office:value-type="string" calcext:value-type="string">
            <text:p>Young Adult &amp; Children's Literature | Regional &amp; National Awards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Automatic | Nero Book Awards | Wikipedia</text:p>
          </table:table-cell>
          <table:table-cell office:value-type="string" calcext:value-type="string">
            <text:p>not_checked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nero_book_awards_debut_fiction</text:p>
          </table:table-cell>
          <table:table-cell office:value-type="string" calcext:value-type="string">
            <text:p>Nero Book Awards - Debut Fictio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s://nerobookawards.com/key-dates/</text:p>
          </table:table-cell>
          <table:table-cell office:value-type="string" calcext:value-type="string">
            <text:p>Literary &amp; General Fiction | Regional &amp; National Awards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Automatic | Nero Book Awards | Wikipedia</text:p>
          </table:table-cell>
          <table:table-cell office:value-type="string" calcext:value-type="string">
            <text:p>not_checked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nero_book_awards_fiction</text:p>
          </table:table-cell>
          <table:table-cell office:value-type="string" calcext:value-type="string">
            <text:p>Nero Book Awards - Fictio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s://nerobookawards.com/key-dates/</text:p>
          </table:table-cell>
          <table:table-cell office:value-type="string" calcext:value-type="string">
            <text:p>Literary &amp; General Fiction | Regional &amp; National Awards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Automatic | Nero Book Awards | Wikipedia</text:p>
          </table:table-cell>
          <table:table-cell office:value-type="string" calcext:value-type="string">
            <text:p>not_checked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nero_book_awards_gold_prize</text:p>
          </table:table-cell>
          <table:table-cell office:value-type="string" calcext:value-type="string">
            <text:p>Nero Gold Prize / Book of the Year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s://nerobookawards.com/key-dates/</text:p>
          </table:table-cell>
          <table:table-cell office:value-type="string" calcext:value-type="string">
            <text:p>Regional &amp; National Awards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Automatic | Nero Book Awards | Wikipedia</text:p>
          </table:table-cell>
          <table:table-cell office:value-type="string" calcext:value-type="string">
            <text:p>not_checked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nero_book_awards_nonfiction</text:p>
          </table:table-cell>
          <table:table-cell office:value-type="string" calcext:value-type="string">
            <text:p>Nero Book Awards - Non-Fictio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s://nerobookawards.com/key-dates/</text:p>
          </table:table-cell>
          <table:table-cell office:value-type="string" calcext:value-type="string">
            <text:p>Nonfiction | Regional &amp; National Awards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Automatic | Nero Book Awards | Wikipedia</text:p>
          </table:table-cell>
          <table:table-cell office:value-type="string" calcext:value-type="string">
            <text:p>not_checked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ngaio_marsh_award_crime_novel</text:p>
          </table:table-cell>
          <table:table-cell office:value-type="string" calcext:value-type="string">
            <text:p>Ngaio Marsh Award - Crime Nove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s://www.librarything.com/award/5348.0.2427/Ngaio-Marsh-Award-First-Novel</text:p>
          </table:table-cell>
          <table:table-cell office:value-type="string" calcext:value-type="string">
            <text:p>Crime, Mystery &amp; Thriller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Automatic | LibraryThing | Wikipedia</text:p>
          </table:table-cell>
          <table:table-cell office:value-type="string" calcext:value-type="string">
            <text:p>not_checked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ngaio_marsh_award_first_novel</text:p>
          </table:table-cell>
          <table:table-cell office:value-type="string" calcext:value-type="string">
            <text:p>Ngaio Marsh Award - First Nove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s://www.librarything.com/award/5348.0.2427/Ngaio-Marsh-Award-First-Novel</text:p>
          </table:table-cell>
          <table:table-cell office:value-type="string" calcext:value-type="string">
            <text:p>Crime, Mystery &amp; Thriller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Automatic | LibraryThing | Wikipedia</text:p>
          </table:table-cell>
          <table:table-cell office:value-type="string" calcext:value-type="string">
            <text:p>not_checked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ngaio_marsh_award_non_fiction</text:p>
          </table:table-cell>
          <table:table-cell office:value-type="string" calcext:value-type="string">
            <text:p>Ngaio Marsh Award - Non-Fictio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s://www.librarything.com/award/5348.0.2427/Ngaio-Marsh-Award-First-Novel</text:p>
          </table:table-cell>
          <table:table-cell office:value-type="string" calcext:value-type="string">
            <text:p>Crime, Mystery &amp; Thriller | Nonfiction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Automatic | LibraryThing | Wikipedia</text:p>
          </table:table-cell>
          <table:table-cell office:value-type="string" calcext:value-type="string">
            <text:p>not_checked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ngaio_marsh_award_younger_readers</text:p>
          </table:table-cell>
          <table:table-cell office:value-type="string" calcext:value-type="string">
            <text:p>Ngaio Marsh Award - Younger Readers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s://www.librarything.com/award/5348.0.2427/Ngaio-Marsh-Award-First-Novel</text:p>
          </table:table-cell>
          <table:table-cell office:value-type="string" calcext:value-type="string">
            <text:p>Crime, Mystery &amp; Thriller | Young Adult &amp; Children's Literature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Automatic | LibraryThing | Wikipedia</text:p>
          </table:table-cell>
          <table:table-cell office:value-type="string" calcext:value-type="string">
            <text:p>not_checked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nommo_graphic_novel</text:p>
          </table:table-cell>
          <table:table-cell office:value-type="string" calcext:value-type="string">
            <text:p>Nommo - Graphic Nove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s://en.wikipedia.org/wiki/Nommo_Awards</text:p>
          </table:table-cell>
          <table:table-cell office:value-type="string" calcext:value-type="string">
            <text:p>Science Fiction | Fantasy | Regional &amp; National Awards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Automatic | en.wikipedia.org | api.wikimedia.org</text:p>
          </table:table-cell>
          <table:table-cell office:value-type="string" calcext:value-type="string">
            <text:p>not_checked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nommo_novel</text:p>
          </table:table-cell>
          <table:table-cell office:value-type="string" calcext:value-type="string">
            <text:p>Nommo - Nove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s://en.wikipedia.org/wiki/Nommo_Awards</text:p>
          </table:table-cell>
          <table:table-cell office:value-type="string" calcext:value-type="string">
            <text:p>Science Fiction | Fantasy | Regional &amp; National Awards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Automatic | en.wikipedia.org | api.wikimedia.org</text:p>
          </table:table-cell>
          <table:table-cell office:value-type="string" calcext:value-type="string">
            <text:p>not_checked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nommo_novella</text:p>
          </table:table-cell>
          <table:table-cell office:value-type="string" calcext:value-type="string">
            <text:p>Nommo - Novella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s://en.wikipedia.org/wiki/Nommo_Awards</text:p>
          </table:table-cell>
          <table:table-cell office:value-type="string" calcext:value-type="string">
            <text:p>Science Fiction | Fantasy | Regional &amp; National Awards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Automatic | en.wikipedia.org | api.wikimedia.org</text:p>
          </table:table-cell>
          <table:table-cell office:value-type="string" calcext:value-type="string">
            <text:p>not_checked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nsw_premiers_literary_awards_book_of_the_year</text:p>
          </table:table-cell>
          <table:table-cell office:value-type="string" calcext:value-type="string">
            <text:p>NSW Premier's Literary Awards - Book of the Year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s://www.sl.nsw.gov.au/awards/nsw-literary-awards/book-year</text:p>
          </table:table-cell>
          <table:table-cell office:value-type="string" calcext:value-type="string">
            <text:p>Nonfiction | Regional &amp; National Awards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Automatic | State Library NSW | Wikipedia</text:p>
          </table:table-cell>
          <table:table-cell office:value-type="string" calcext:value-type="string">
            <text:p>not_checked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nsw_premiers_literary_awards_christina_stead_fiction</text:p>
          </table:table-cell>
          <table:table-cell office:value-type="string" calcext:value-type="string">
            <text:p>NSW Premier's Literary Awards - Christina Stead Prize for Fictio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s://www.sl.nsw.gov.au/awards/nsw-literary-awards/christina-stead-prize-fiction</text:p>
          </table:table-cell>
          <table:table-cell office:value-type="string" calcext:value-type="string">
            <text:p>Literary &amp; General Fiction | Regional &amp; National Awards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not_checked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nsw_premiers_literary_awards_douglas_stewart_nonfiction</text:p>
          </table:table-cell>
          <table:table-cell office:value-type="string" calcext:value-type="string">
            <text:p>NSW Premier's Literary Awards - Douglas Stewart Prize for Non-Fictio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s://www.sl.nsw.gov.au/awards/nsw-literary-awards/douglas-stewart-prize-non-fiction</text:p>
          </table:table-cell>
          <table:table-cell office:value-type="string" calcext:value-type="string">
            <text:p>Nonfiction | Regional &amp; National Awards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not_checked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nsw_premiers_literary_awards_ethel_turner_young_people</text:p>
          </table:table-cell>
          <table:table-cell office:value-type="string" calcext:value-type="string">
            <text:p>NSW Premier's Literary Awards - Ethel Turner Prize for Young People's Literatur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s://www.sl.nsw.gov.au/awards/nsw-literary-awards/ethel-turner-prize-young-peoples-literature</text:p>
          </table:table-cell>
          <table:table-cell office:value-type="string" calcext:value-type="string">
            <text:p>Young Adult &amp; Children's Literature | Regional &amp; National Awards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not_checked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nsw_premiers_literary_awards_glenda_adams_new_writing</text:p>
          </table:table-cell>
          <table:table-cell office:value-type="string" calcext:value-type="string">
            <text:p>NSW Premier's Literary Awards - UTS Glenda Adams Award for New Writi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s://www.sl.nsw.gov.au/awards/nsw-literary-awards/uts-glenda-adams-award-new-writing</text:p>
          </table:table-cell>
          <table:table-cell office:value-type="string" calcext:value-type="string">
            <text:p>Literary &amp; General Fiction | Regional &amp; National Awards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not_checked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nsw_premiers_literary_awards_indigenous_writers</text:p>
          </table:table-cell>
          <table:table-cell office:value-type="string" calcext:value-type="string">
            <text:p>NSW Premier's Literary Awards - Indigenous Writers' Priz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s://www.sl.nsw.gov.au/awards/nsw-literary-awards/indigenous-writers-prize</text:p>
          </table:table-cell>
          <table:table-cell office:value-type="string" calcext:value-type="string">
            <text:p>Regional &amp; National Awards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not_checked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nsw_premiers_literary_awards_multicultural_nsw</text:p>
          </table:table-cell>
          <table:table-cell office:value-type="string" calcext:value-type="string">
            <text:p>NSW Premier's Literary Awards - Multicultural NSW Awar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s://www.sl.nsw.gov.au/awards/nsw-literary-awards/multicultural-nsw-award</text:p>
          </table:table-cell>
          <table:table-cell office:value-type="string" calcext:value-type="string">
            <text:p>Nonfiction | Regional &amp; National Awards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not_checked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nsw_premiers_literary_awards_patricia_wrightson_childrens</text:p>
          </table:table-cell>
          <table:table-cell office:value-type="string" calcext:value-type="string">
            <text:p>NSW Premier's Literary Awards - Patricia Wrightson Prize for Children's Literatur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s://www.sl.nsw.gov.au/awards/nsw-literary-awards/patricia-wrightson-prize-childrens-literature</text:p>
          </table:table-cell>
          <table:table-cell office:value-type="string" calcext:value-type="string">
            <text:p>Young Adult &amp; Children's Literature | Regional &amp; National Awards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not_checked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nsw_premiers_literary_awards_peoples_choice</text:p>
          </table:table-cell>
          <table:table-cell office:value-type="string" calcext:value-type="string">
            <text:p>NSW Premier's Literary Awards - People's Choice Awar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s://www.sl.nsw.gov.au/awards/nsw-literary-awards/university-sydney-peoples-choice-award</text:p>
          </table:table-cell>
          <table:table-cell office:value-type="string" calcext:value-type="string">
            <text:p>Regional &amp; National Awards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Automatic | State Library NSW | Wikipedia</text:p>
          </table:table-cell>
          <table:table-cell office:value-type="string" calcext:value-type="string">
            <text:p>not_checked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oprah_book_club</text:p>
          </table:table-cell>
          <table:table-cell office:value-type="string" calcext:value-type="string">
            <text:p>Oprah's Book Club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s://www.oprahdaily.com/entertainment/books/g23067476/oprah-book-club-list/</text:p>
          </table:table-cell>
          <table:table-cell office:value-type="string" calcext:value-type="string">
            <text:p>General Audience Book Clubs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not_checked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orwell_prize_political_writing</text:p>
          </table:table-cell>
          <table:table-cell office:value-type="string" calcext:value-type="string">
            <text:p>Orwell Prize for Political Writi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s://www.orwellfoundation.com/the-orwell-prizes/previous-winners/</text:p>
          </table:table-cell>
          <table:table-cell office:value-type="string" calcext:value-type="string">
            <text:p>Nonfiction | Regional &amp; National Awards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Automatic | Official Orwell | Wikipedia</text:p>
          </table:table-cell>
          <table:table-cell office:value-type="string" calcext:value-type="string">
            <text:p>not_checked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otherwise_tiptree_books_and_series</text:p>
          </table:table-cell>
          <table:table-cell office:value-type="string" calcext:value-type="string">
            <text:p>Otherwise/Tiptree - Books and Series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s://www.sfadb.com/Otherwise_Award</text:p>
          </table:table-cell>
          <table:table-cell office:value-type="string" calcext:value-type="string">
            <text:p>Science Fiction | Fantasy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not_checked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pen_diamonstein_spielvogel_award_essay</text:p>
          </table:table-cell>
          <table:table-cell office:value-type="string" calcext:value-type="string">
            <text:p>PEN/Diamonstein-Spielvogel Award for the Art of the Essay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s://pen.org/literary-awards/pen-diamonstein-spielvogel-award-for-the-art-of-the-essay/</text:p>
          </table:table-cell>
          <table:table-cell office:value-type="string" calcext:value-type="string">
            <text:p>Nonfiction | Regional &amp; National Awards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not_checked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pen_faulkner_award_fiction</text:p>
          </table:table-cell>
          <table:table-cell office:value-type="string" calcext:value-type="string">
            <text:p>PEN/Faulkner Award for Fictio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s://www.penfaulkner.org/our-awards/pen-faulkner-award/</text:p>
          </table:table-cell>
          <table:table-cell office:value-type="string" calcext:value-type="string">
            <text:p>Literary &amp; General Fiction | Regional &amp; National Awards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not_checked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pen_galbraith_award_nonfiction</text:p>
          </table:table-cell>
          <table:table-cell office:value-type="string" calcext:value-type="string">
            <text:p>PEN/John Kenneth Galbraith Award for Nonfictio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s://pen.org/literary-awards/pen-galbraith-award-for-nonfiction/</text:p>
          </table:table-cell>
          <table:table-cell office:value-type="string" calcext:value-type="string">
            <text:p>Nonfiction | Regional &amp; National Awards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not_checked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pen_hemingway_award_debut_novel</text:p>
          </table:table-cell>
          <table:table-cell office:value-type="string" calcext:value-type="string">
            <text:p>PEN/Hemingway Award for Debut Nove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s://www.penfaulkner.org/our-awards/pen-hemingway-award/</text:p>
          </table:table-cell>
          <table:table-cell office:value-type="string" calcext:value-type="string">
            <text:p>Literary &amp; General Fiction | Regional &amp; National Awards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not_checked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pen_jean_stein_book_award</text:p>
          </table:table-cell>
          <table:table-cell office:value-type="string" calcext:value-type="string">
            <text:p>PEN/Jean Stein Book Awar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s://pen.org/literary-awards/pen-jean-stein-book-award/</text:p>
          </table:table-cell>
          <table:table-cell office:value-type="string" calcext:value-type="string">
            <text:p>Nonfiction | Literary &amp; General Fiction | Regional &amp; National Awards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not_checked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pen_open_book_award</text:p>
          </table:table-cell>
          <table:table-cell office:value-type="string" calcext:value-type="string">
            <text:p>PEN Open Book Awar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s://pen.org/literary-awards/pen-open-book-award/</text:p>
          </table:table-cell>
          <table:table-cell office:value-type="string" calcext:value-type="string">
            <text:p>Nonfiction | Literary &amp; General Fiction | Regional &amp; National Awards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not_checked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philip_k_dick_award_novel</text:p>
          </table:table-cell>
          <table:table-cell office:value-type="string" calcext:value-type="string">
            <text:p>Philip K. Dick Award - Nove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s://www.sfadb.com/Philip_K_Dick_Award</text:p>
          </table:table-cell>
          <table:table-cell office:value-type="string" calcext:value-type="string">
            <text:p>Science Fiction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not_checked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prime_ministers_literary_awards_australian_history</text:p>
          </table:table-cell>
          <table:table-cell office:value-type="string" calcext:value-type="string">
            <text:p>Prime Minister's Literary Awards - Australian History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s://creative.gov.au/news-events/events/prime-ministers-literary-awards</text:p>
          </table:table-cell>
          <table:table-cell office:value-type="string" calcext:value-type="string">
            <text:p>Nonfiction | Regional &amp; National Awards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Automatic | Creative Australia | Wikipedia</text:p>
          </table:table-cell>
          <table:table-cell office:value-type="string" calcext:value-type="string">
            <text:p>not_checked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prime_ministers_literary_awards_childrens_literature</text:p>
          </table:table-cell>
          <table:table-cell office:value-type="string" calcext:value-type="string">
            <text:p>Prime Minister's Literary Awards - Children's Literatur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s://creative.gov.au/news-events/events/prime-ministers-literary-awards</text:p>
          </table:table-cell>
          <table:table-cell office:value-type="string" calcext:value-type="string">
            <text:p>Young Adult &amp; Children's Literature | Regional &amp; National Awards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Automatic | Creative Australia | Wikipedia</text:p>
          </table:table-cell>
          <table:table-cell office:value-type="string" calcext:value-type="string">
            <text:p>not_checked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prime_ministers_literary_awards_fiction</text:p>
          </table:table-cell>
          <table:table-cell office:value-type="string" calcext:value-type="string">
            <text:p>Prime Minister's Literary Awards - Fictio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s://creative.gov.au/news-events/events/prime-ministers-literary-awards</text:p>
          </table:table-cell>
          <table:table-cell office:value-type="string" calcext:value-type="string">
            <text:p>Literary &amp; General Fiction | Regional &amp; National Awards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Automatic | Creative Australia | Wikipedia</text:p>
          </table:table-cell>
          <table:table-cell office:value-type="string" calcext:value-type="string">
            <text:p>not_checked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prime_ministers_literary_awards_nonfiction</text:p>
          </table:table-cell>
          <table:table-cell office:value-type="string" calcext:value-type="string">
            <text:p>Prime Minister's Literary Awards - Non-fictio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s://creative.gov.au/news-events/events/prime-ministers-literary-awards</text:p>
          </table:table-cell>
          <table:table-cell office:value-type="string" calcext:value-type="string">
            <text:p>Nonfiction | Regional &amp; National Awards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Automatic | Creative Australia | Wikipedia</text:p>
          </table:table-cell>
          <table:table-cell office:value-type="string" calcext:value-type="string">
            <text:p>not_checked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prime_ministers_literary_awards_young_adult_literature</text:p>
          </table:table-cell>
          <table:table-cell office:value-type="string" calcext:value-type="string">
            <text:p>Prime Minister's Literary Awards - Young Adult Literatur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s://creative.gov.au/news-events/events/prime-ministers-literary-awards</text:p>
          </table:table-cell>
          <table:table-cell office:value-type="string" calcext:value-type="string">
            <text:p>Young Adult &amp; Children's Literature | Regional &amp; National Awards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Automatic | Creative Australia | Wikipedia</text:p>
          </table:table-cell>
          <table:table-cell office:value-type="string" calcext:value-type="string">
            <text:p>not_checked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prometheus_hall_of_fame</text:p>
          </table:table-cell>
          <table:table-cell office:value-type="string" calcext:value-type="string">
            <text:p>Prometheus - Hall of Fam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s://www.sfadb.com/Prometheus_Awards</text:p>
          </table:table-cell>
          <table:table-cell office:value-type="string" calcext:value-type="string">
            <text:p>Science Fiction | Fantasy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Automatic | SFADB | ISFDB</text:p>
          </table:table-cell>
          <table:table-cell office:value-type="string" calcext:value-type="string">
            <text:p>not_checked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prometheus_novel</text:p>
          </table:table-cell>
          <table:table-cell office:value-type="string" calcext:value-type="string">
            <text:p>Prometheus - Nove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s://www.sfadb.com/Prometheus_Awards</text:p>
          </table:table-cell>
          <table:table-cell office:value-type="string" calcext:value-type="string">
            <text:p>Science Fiction | Fantasy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Automatic | SFADB | ISFDB</text:p>
          </table:table-cell>
          <table:table-cell office:value-type="string" calcext:value-type="string">
            <text:p>not_checked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prometheus_special_awards</text:p>
          </table:table-cell>
          <table:table-cell office:value-type="string" calcext:value-type="string">
            <text:p>Prometheus - Special Awards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s://www.sfadb.com/Prometheus_Awards</text:p>
          </table:table-cell>
          <table:table-cell office:value-type="string" calcext:value-type="string">
            <text:p>Science Fiction | Fantasy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not_checked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prometheus_young_adult_honor_roll</text:p>
          </table:table-cell>
          <table:table-cell office:value-type="string" calcext:value-type="string">
            <text:p>Prometheus - Young Adult Honor Rol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s://www.sfadb.com/Prometheus_Awards</text:p>
          </table:table-cell>
          <table:table-cell office:value-type="string" calcext:value-type="string">
            <text:p>Young Adult &amp; Children's Literature | Science Fiction | Fantasy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not_checked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pulitzer_prize_fiction</text:p>
          </table:table-cell>
          <table:table-cell office:value-type="string" calcext:value-type="string">
            <text:p>Pulitzer Prize - Fictio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s://www.pulitzer.org/prize-winners-by-category/219</text:p>
          </table:table-cell>
          <table:table-cell office:value-type="string" calcext:value-type="string">
            <text:p>Literary &amp; General Fiction | Regional &amp; National Awards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Automatic | Official Pulitzer | Wikipedia | Britannica</text:p>
          </table:table-cell>
          <table:table-cell office:value-type="string" calcext:value-type="string">
            <text:p>not_checked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pulitzer_prize_general_nonfiction</text:p>
          </table:table-cell>
          <table:table-cell office:value-type="string" calcext:value-type="string">
            <text:p>Pulitzer Prize - General Nonfictio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s://www.pulitzer.org/prize-winners-by-category/223</text:p>
          </table:table-cell>
          <table:table-cell office:value-type="string" calcext:value-type="string">
            <text:p>Nonfiction | Regional &amp; National Awards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Automatic | Official Pulitzer | Wikipedia | Britannica</text:p>
          </table:table-cell>
          <table:table-cell office:value-type="string" calcext:value-type="string">
            <text:p>not_checked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queensland_literary_awards_childrens</text:p>
          </table:table-cell>
          <table:table-cell office:value-type="string" calcext:value-type="string">
            <text:p>Queensland Literary Awards - Children's Book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s://www.slq.qld.gov.au/queensland-literary-awards/past-winners</text:p>
          </table:table-cell>
          <table:table-cell office:value-type="string" calcext:value-type="string">
            <text:p>Young Adult &amp; Children's Literature | Regional &amp; National Awards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Automatic | State Library of Queensland | Wikipedia</text:p>
          </table:table-cell>
          <table:table-cell office:value-type="string" calcext:value-type="string">
            <text:p>not_checked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queensland_literary_awards_fiction</text:p>
          </table:table-cell>
          <table:table-cell office:value-type="string" calcext:value-type="string">
            <text:p>Queensland Literary Awards - Fictio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s://www.slq.qld.gov.au/queensland-literary-awards/past-winners</text:p>
          </table:table-cell>
          <table:table-cell office:value-type="string" calcext:value-type="string">
            <text:p>Literary &amp; General Fiction | Regional &amp; National Awards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Automatic | State Library of Queensland | Wikipedia</text:p>
          </table:table-cell>
          <table:table-cell office:value-type="string" calcext:value-type="string">
            <text:p>not_checked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queensland_literary_awards_nonfiction</text:p>
          </table:table-cell>
          <table:table-cell office:value-type="string" calcext:value-type="string">
            <text:p>Queensland Literary Awards - Non-Fictio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s://www.slq.qld.gov.au/queensland-literary-awards/past-winners</text:p>
          </table:table-cell>
          <table:table-cell office:value-type="string" calcext:value-type="string">
            <text:p>Nonfiction | Regional &amp; National Awards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Automatic | State Library of Queensland | Wikipedia</text:p>
          </table:table-cell>
          <table:table-cell office:value-type="string" calcext:value-type="string">
            <text:p>not_checked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queensland_literary_awards_peoples_choice</text:p>
          </table:table-cell>
          <table:table-cell office:value-type="string" calcext:value-type="string">
            <text:p>Queensland Literary Awards - People's Choic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s://www.slq.qld.gov.au/queensland-literary-awards/past-winners</text:p>
          </table:table-cell>
          <table:table-cell office:value-type="string" calcext:value-type="string">
            <text:p>Regional &amp; National Awards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Automatic | State Library of Queensland | Wikipedia</text:p>
          </table:table-cell>
          <table:table-cell office:value-type="string" calcext:value-type="string">
            <text:p>not_checked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queensland_literary_awards_state_significance</text:p>
          </table:table-cell>
          <table:table-cell office:value-type="string" calcext:value-type="string">
            <text:p>Queensland Literary Awards - Work of State Significanc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s://www.slq.qld.gov.au/queensland-literary-awards/past-winners</text:p>
          </table:table-cell>
          <table:table-cell office:value-type="string" calcext:value-type="string">
            <text:p>Regional &amp; National Awards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Automatic | State Library of Queensland | Wikipedia</text:p>
          </table:table-cell>
          <table:table-cell office:value-type="string" calcext:value-type="string">
            <text:p>not_checked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queensland_literary_awards_young_adult</text:p>
          </table:table-cell>
          <table:table-cell office:value-type="string" calcext:value-type="string">
            <text:p>Queensland Literary Awards - Young Adult Book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s://www.slq.qld.gov.au/queensland-literary-awards/past-winners</text:p>
          </table:table-cell>
          <table:table-cell office:value-type="string" calcext:value-type="string">
            <text:p>Young Adult &amp; Children's Literature | Regional &amp; National Awards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Automatic | State Library of Queensland | Wikipedia</text:p>
          </table:table-cell>
          <table:table-cell office:value-type="string" calcext:value-type="string">
            <text:p>not_checked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r_bookclub_previous_selections</text:p>
          </table:table-cell>
          <table:table-cell office:value-type="string" calcext:value-type="string">
            <text:p>r/bookclub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s://www.reddit.com/r/bookclub/wiki/previous/</text:p>
          </table:table-cell>
          <table:table-cell office:value-type="string" calcext:value-type="string">
            <text:p>Online Community Book Clubs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Check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_fantasy_top_novels_2025</text:p>
          </table:table-cell>
          <table:table-cell office:value-type="string" calcext:value-type="string">
            <text:p>r/Fantasy Top Novels 202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s://www.reddit.com/r/Fantasy/comments/1jjif55/rfantasy_top_novels_2025_results/</text:p>
          </table:table-cell>
          <table:table-cell office:value-type="string" calcext:value-type="string">
            <text:p>Fantasy | Online Community Book Clubs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Automatic | old.reddit.com | web.archive.org | reddit.com</text:p>
          </table:table-cell>
          <table:table-cell office:value-type="string" calcext:value-type="string">
            <text:p>Checked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_fantasy_top_self_published_novels_2024</text:p>
          </table:table-cell>
          <table:table-cell office:value-type="string" calcext:value-type="string">
            <text:p>r/Fantasy Top Self-Published Novels 202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s://www.reddit.com/r/Fantasy/comments/1g3lo7l/big_list_rfantasys_top_selfpublished_novels_2024/</text:p>
          </table:table-cell>
          <table:table-cell office:value-type="string" calcext:value-type="string">
            <text:p>Fantasy | Online Community Book Clubs</text:p>
          </table:table-cell>
          <table:table-cell office:value-type="string" calcext:value-type="string">
            <text:p>true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Automatic | old.reddit.com | web.archive.org | reddit.com</text:p>
          </table:table-cell>
          <table:table-cell office:value-type="string" calcext:value-type="string">
            <text:p>Checke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_fantasy_top_standalone_novels_2024</text:p>
          </table:table-cell>
          <table:table-cell office:value-type="string" calcext:value-type="string">
            <text:p>r/Fantasy Top Standalone Novels 202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s://www.reddit.com/r/Fantasy/comments/1agicpw/rfantasys_2024_top_standalone_novel_poll_results/</text:p>
          </table:table-cell>
          <table:table-cell office:value-type="string" calcext:value-type="string">
            <text:p>Fantasy | Online Community Book Clubs</text:p>
          </table:table-cell>
          <table:table-cell office:value-type="string" calcext:value-type="string">
            <text:p>true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Automatic | old.reddit.com | web.archive.org | reddit.com</text:p>
          </table:table-cell>
          <table:table-cell office:value-type="string" calcext:value-type="string">
            <text:p>Checked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read_with_jenna</text:p>
          </table:table-cell>
          <table:table-cell office:value-type="string" calcext:value-type="string">
            <text:p>Read With Jenna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s://www.today.com/shop/read-jenna-book-club-list-today-s-jenna-bush-hager-t164652</text:p>
          </table:table-cell>
          <table:table-cell office:value-type="string" calcext:value-type="string">
            <text:p>General Audience Book Clubs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not_checked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read_with_jenna_jr</text:p>
          </table:table-cell>
          <table:table-cell office:value-type="string" calcext:value-type="string">
            <text:p>Read With Jenna Jr.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s://www.today.com/shop/read-with-jenna</text:p>
          </table:table-cell>
          <table:table-cell office:value-type="string" calcext:value-type="string">
            <text:p>General Audience Book Clubs | Young Adult &amp; Children's Literature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Automatic | TODAY Jenna hub | TODAY 2026 Jr. archive bootstrap</text:p>
          </table:table-cell>
          <table:table-cell office:value-type="string" calcext:value-type="string">
            <text:p>not_checked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reese_book_club</text:p>
          </table:table-cell>
          <table:table-cell office:value-type="string" calcext:value-type="string">
            <text:p>Reese's Book Club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s://reesesbookclub.com/our-picks/</text:p>
          </table:table-cell>
          <table:table-cell office:value-type="string" calcext:value-type="string">
            <text:p>General Audience Book Clubs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not_checked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reese_book_club_ya</text:p>
          </table:table-cell>
          <table:table-cell office:value-type="string" calcext:value-type="string">
            <text:p>Reese's Book Club - YA Picks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s://reesesbookclub.com/our-picks/</text:p>
          </table:table-cell>
          <table:table-cell office:value-type="string" calcext:value-type="string">
            <text:p>General Audience Book Clubs | Young Adult &amp; Children's Literature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not_checked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richard_judy_book_club</text:p>
          </table:table-cell>
          <table:table-cell office:value-type="string" calcext:value-type="string">
            <text:p>Richard &amp; Judy Book Club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s://www.tgjonesonline.co.uk/books/book-club</text:p>
          </table:table-cell>
          <table:table-cell office:value-type="string" calcext:value-type="string">
            <text:p>General Audience Book Clubs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Automatic | tgjonesonline.co.uk | booknotification.com</text:p>
          </table:table-cell>
          <table:table-cell office:value-type="string" calcext:value-type="string">
            <text:p>not_checked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ripped_bodice_awards</text:p>
          </table:table-cell>
          <table:table-cell office:value-type="string" calcext:value-type="string">
            <text:p>Ripped Bodice Awards for Excellence in Romance Fictio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s://en.wikipedia.org/wiki/The_Ripped_Bodice</text:p>
          </table:table-cell>
          <table:table-cell office:value-type="string" calcext:value-type="string">
            <text:p>Romance | Regional &amp; National Awards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not_checked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rna_joan_hessayon_award</text:p>
          </table:table-cell>
          <table:table-cell office:value-type="string" calcext:value-type="string">
            <text:p>RNA Joan Hessayon Award for New Writers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s://romanticnovelistsassociation.org/past-winners</text:p>
          </table:table-cell>
          <table:table-cell office:value-type="string" calcext:value-type="string">
            <text:p>Romance | Regional &amp; National Awards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not_checked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rna_romantic_novel_awards</text:p>
          </table:table-cell>
          <table:table-cell office:value-type="string" calcext:value-type="string">
            <text:p>RNA Romantic Novel of the Year Awards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s://romanticnovelistsassociation.org/past-winners</text:p>
          </table:table-cell>
          <table:table-cell office:value-type="string" calcext:value-type="string">
            <text:p>Romance | Regional &amp; National Awards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not_checked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romance_writers_australia_ruby_awards</text:p>
          </table:table-cell>
          <table:table-cell office:value-type="string" calcext:value-type="string">
            <text:p>Romance Writers of Australia RUBY Awards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s://romanceaustralia.com/search?q=RUBY&amp;type=article%2Cpage</text:p>
          </table:table-cell>
          <table:table-cell office:value-type="string" calcext:value-type="string">
            <text:p>Romance | Regional &amp; National Awards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not_checked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romantic_times_reviewers_choice_romance</text:p>
          </table:table-cell>
          <table:table-cell office:value-type="string" calcext:value-type="string">
            <text:p>Romantic Times Reviewers' Choice Awards - Romance Categories (discontinued)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s://web.archive.org/web/*/http://www.rtbookreviews.com/tags/rt-awards</text:p>
          </table:table-cell>
          <table:table-cell office:value-type="string" calcext:value-type="string">
            <text:p>Romance | Regional &amp; National Awards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not_checked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royal_society_science_book_prize</text:p>
          </table:table-cell>
          <table:table-cell office:value-type="string" calcext:value-type="string">
            <text:p>Royal Society Trivedi Science Book Priz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s://www.royalsociety.org/medals-and-prizes/science-book-prize/</text:p>
          </table:table-cell>
          <table:table-cell office:value-type="string" calcext:value-type="string">
            <text:p>Nonfiction | Regional &amp; National Awards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Automatic | Official Royal Society | Wikipedia</text:p>
          </table:table-cell>
          <table:table-cell office:value-type="string" calcext:value-type="string">
            <text:p>not_checked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rwa_rita_awards</text:p>
          </table:table-cell>
          <table:table-cell office:value-type="string" calcext:value-type="string">
            <text:p>RWA RITA Awards (discontinued)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s://en.wikipedia.org/wiki/RITA_Award</text:p>
          </table:table-cell>
          <table:table-cell office:value-type="string" calcext:value-type="string">
            <text:p>Romance | Regional &amp; National Awards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not_checked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rwa_vivian_awards</text:p>
          </table:table-cell>
          <table:table-cell office:value-type="string" calcext:value-type="string">
            <text:p>RWA Vivian Awards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s://en.wikipedia.org/wiki/RITA_Award</text:p>
          </table:table-cell>
          <table:table-cell office:value-type="string" calcext:value-type="string">
            <text:p>Romance | Regional &amp; National Awards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not_checked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seiun_comic</text:p>
          </table:table-cell>
          <table:table-cell office:value-type="string" calcext:value-type="string">
            <text:p>Seiun - Comic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s://www.sfadb.com/Seiun_Awards</text:p>
          </table:table-cell>
          <table:table-cell office:value-type="string" calcext:value-type="string">
            <text:p>Science Fiction | Regional &amp; National Awards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not_checked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seiun_japanese_long_work</text:p>
          </table:table-cell>
          <table:table-cell office:value-type="string" calcext:value-type="string">
            <text:p>Seiun - Japanese Long Work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s://www.sfadb.com/Seiun_Awards</text:p>
          </table:table-cell>
          <table:table-cell office:value-type="string" calcext:value-type="string">
            <text:p>Science Fiction | Regional &amp; National Awards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Automatic | SFADB | ISFDB</text:p>
          </table:table-cell>
          <table:table-cell office:value-type="string" calcext:value-type="string">
            <text:p>not_checked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seiun_nonfiction</text:p>
          </table:table-cell>
          <table:table-cell office:value-type="string" calcext:value-type="string">
            <text:p>Seiun - Nonfictio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s://www.sfadb.com/Seiun_Awards</text:p>
          </table:table-cell>
          <table:table-cell office:value-type="string" calcext:value-type="string">
            <text:p>Nonfiction | Science Fiction | Regional &amp; National Awards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Automatic | SFADB | ISFDB</text:p>
          </table:table-cell>
          <table:table-cell office:value-type="string" calcext:value-type="string">
            <text:p>not_checked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seiun_translated_novel</text:p>
          </table:table-cell>
          <table:table-cell office:value-type="string" calcext:value-type="string">
            <text:p>Seiun - Translated Nove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s://www.sfadb.com/Seiun_Awards</text:p>
          </table:table-cell>
          <table:table-cell office:value-type="string" calcext:value-type="string">
            <text:p>Science Fiction | Regional &amp; National Awards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Automatic | SFADB | ISFDB</text:p>
          </table:table-cell>
          <table:table-cell office:value-type="string" calcext:value-type="string">
            <text:p>not_checked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service95_book_club</text:p>
          </table:table-cell>
          <table:table-cell office:value-type="string" calcext:value-type="string">
            <text:p>Service95 Book Club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s://www.service95.com/book-club</text:p>
          </table:table-cell>
          <table:table-cell office:value-type="string" calcext:value-type="string">
            <text:p>General Audience Book Clubs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not_checked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shamus_award_first_pi_novel</text:p>
          </table:table-cell>
          <table:table-cell office:value-type="string" calcext:value-type="string">
            <text:p>Shamus Award - First P.I. Nove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s://www.stopyourekillingme.com/Awards/Shamus_Awards.html</text:p>
          </table:table-cell>
          <table:table-cell office:value-type="string" calcext:value-type="string">
            <text:p>Crime, Mystery &amp; Thriller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Automatic | Stop, You're Killing Me | LibraryThing</text:p>
          </table:table-cell>
          <table:table-cell office:value-type="string" calcext:value-type="string">
            <text:p>not_checked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shamus_award_paperback_original</text:p>
          </table:table-cell>
          <table:table-cell office:value-type="string" calcext:value-type="string">
            <text:p>Shamus Award - Paperback Origina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s://www.stopyourekillingme.com/Awards/Shamus_Awards.html</text:p>
          </table:table-cell>
          <table:table-cell office:value-type="string" calcext:value-type="string">
            <text:p>Crime, Mystery &amp; Thriller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Automatic | Stop, You're Killing Me | LibraryThing</text:p>
          </table:table-cell>
          <table:table-cell office:value-type="string" calcext:value-type="string">
            <text:p>not_checked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shamus_award_pi_novel</text:p>
          </table:table-cell>
          <table:table-cell office:value-type="string" calcext:value-type="string">
            <text:p>Shamus Award - P.I. Nove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s://www.stopyourekillingme.com/Awards/Shamus_Awards.html</text:p>
          </table:table-cell>
          <table:table-cell office:value-type="string" calcext:value-type="string">
            <text:p>Crime, Mystery &amp; Thriller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Automatic | Stop, You're Killing Me | LibraryThing</text:p>
          </table:table-cell>
          <table:table-cell office:value-type="string" calcext:value-type="string">
            <text:p>not_checked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hirley_jackson_edited_anthology</text:p>
          </table:table-cell>
          <table:table-cell office:value-type="string" calcext:value-type="string">
            <text:p>Shirley Jackson - Edited Anthology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s://www.sfadb.com/Shirley_Jackson_Awards</text:p>
          </table:table-cell>
          <table:table-cell office:value-type="string" calcext:value-type="string">
            <text:p>Horror &amp; Dark Fiction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Automatic | SFADB | ISFDB</text:p>
          </table:table-cell>
          <table:table-cell office:value-type="string" calcext:value-type="string">
            <text:p>not_checked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hirley_jackson_novel</text:p>
          </table:table-cell>
          <table:table-cell office:value-type="string" calcext:value-type="string">
            <text:p>Shirley Jackson - Nove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s://www.sfadb.com/Shirley_Jackson_Awards</text:p>
          </table:table-cell>
          <table:table-cell office:value-type="string" calcext:value-type="string">
            <text:p>Horror &amp; Dark Fiction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Automatic | SFADB | ISFDB</text:p>
          </table:table-cell>
          <table:table-cell office:value-type="string" calcext:value-type="string">
            <text:p>not_checked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hirley_jackson_novella</text:p>
          </table:table-cell>
          <table:table-cell office:value-type="string" calcext:value-type="string">
            <text:p>Shirley Jackson - Novella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s://www.sfadb.com/Shirley_Jackson_Awards</text:p>
          </table:table-cell>
          <table:table-cell office:value-type="string" calcext:value-type="string">
            <text:p>Horror &amp; Dark Fiction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Automatic | SFADB | ISFDB</text:p>
          </table:table-cell>
          <table:table-cell office:value-type="string" calcext:value-type="string">
            <text:p>not_checked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hirley_jackson_single_author_collection</text:p>
          </table:table-cell>
          <table:table-cell office:value-type="string" calcext:value-type="string">
            <text:p>Shirley Jackson - Single-Author Collectio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s://www.sfadb.com/Shirley_Jackson_Awards</text:p>
          </table:table-cell>
          <table:table-cell office:value-type="string" calcext:value-type="string">
            <text:p>Horror &amp; Dark Fiction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Automatic | SFADB | ISFDB</text:p>
          </table:table-cell>
          <table:table-cell office:value-type="string" calcext:value-type="string">
            <text:p>not_checked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south_australian_literary_awards_childrens</text:p>
          </table:table-cell>
          <table:table-cell office:value-type="string" calcext:value-type="string">
            <text:p>South Australian Literary Awards - Children's Literatur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s://stories.slsa.sa.gov.au/south-australian-literary-awards/</text:p>
          </table:table-cell>
          <table:table-cell office:value-type="string" calcext:value-type="string">
            <text:p>Young Adult &amp; Children's Literature | Regional &amp; National Awards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Automatic | State Library of South Australia | Wikipedia</text:p>
          </table:table-cell>
          <table:table-cell office:value-type="string" calcext:value-type="string">
            <text:p>not_checked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south_australian_literary_awards_fiction</text:p>
          </table:table-cell>
          <table:table-cell office:value-type="string" calcext:value-type="string">
            <text:p>South Australian Literary Awards - Fictio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s://stories.slsa.sa.gov.au/south-australian-literary-awards/</text:p>
          </table:table-cell>
          <table:table-cell office:value-type="string" calcext:value-type="string">
            <text:p>Literary &amp; General Fiction | Regional &amp; National Awards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Automatic | State Library of South Australia | Wikipedia</text:p>
          </table:table-cell>
          <table:table-cell office:value-type="string" calcext:value-type="string">
            <text:p>not_checked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south_australian_literary_awards_nonfiction</text:p>
          </table:table-cell>
          <table:table-cell office:value-type="string" calcext:value-type="string">
            <text:p>South Australian Literary Awards - Non-Fictio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s://stories.slsa.sa.gov.au/south-australian-literary-awards/</text:p>
          </table:table-cell>
          <table:table-cell office:value-type="string" calcext:value-type="string">
            <text:p>Nonfiction | Regional &amp; National Awards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Automatic | State Library of South Australia | Wikipedia</text:p>
          </table:table-cell>
          <table:table-cell office:value-type="string" calcext:value-type="string">
            <text:p>not_checked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south_australian_literary_awards_premiers_award</text:p>
          </table:table-cell>
          <table:table-cell office:value-type="string" calcext:value-type="string">
            <text:p>South Australian Literary Awards - Premier's Awar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s://stories.slsa.sa.gov.au/south-australian-literary-awards/</text:p>
          </table:table-cell>
          <table:table-cell office:value-type="string" calcext:value-type="string">
            <text:p>Regional &amp; National Awards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Automatic | State Library of South Australia | Wikipedia</text:p>
          </table:table-cell>
          <table:table-cell office:value-type="string" calcext:value-type="string">
            <text:p>not_checked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south_australian_literary_awards_young_adult</text:p>
          </table:table-cell>
          <table:table-cell office:value-type="string" calcext:value-type="string">
            <text:p>South Australian Literary Awards - Young Adult Fictio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s://stories.slsa.sa.gov.au/south-australian-literary-awards/</text:p>
          </table:table-cell>
          <table:table-cell office:value-type="string" calcext:value-type="string">
            <text:p>Young Adult &amp; Children's Literature | Regional &amp; National Awards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Automatic | State Library of South Australia | Wikipedia</text:p>
          </table:table-cell>
          <table:table-cell office:value-type="string" calcext:value-type="string">
            <text:p>not_checked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spectology</text:p>
          </table:table-cell>
          <table:table-cell office:value-type="string" calcext:value-type="string">
            <text:p>Spectology (discontinued)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s://www.spectology.com/feed.xml</text:p>
          </table:table-cell>
          <table:table-cell office:value-type="string" calcext:value-type="string">
            <text:p>Online Community Book Clubs | Science Fiction | Fantasy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Checked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splatterpunk_anthology</text:p>
          </table:table-cell>
          <table:table-cell office:value-type="string" calcext:value-type="string">
            <text:p>Splatterpunk - Anthology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s://killerconatx.com/awards/</text:p>
          </table:table-cell>
          <table:table-cell office:value-type="string" calcext:value-type="string">
            <text:p>Horror &amp; Dark Fiction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not_checked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splatterpunk_collection</text:p>
          </table:table-cell>
          <table:table-cell office:value-type="string" calcext:value-type="string">
            <text:p>Splatterpunk - Collectio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s://killerconatx.com/awards/</text:p>
          </table:table-cell>
          <table:table-cell office:value-type="string" calcext:value-type="string">
            <text:p>Horror &amp; Dark Fiction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not_checked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splatterpunk_novel</text:p>
          </table:table-cell>
          <table:table-cell office:value-type="string" calcext:value-type="string">
            <text:p>Splatterpunk - Nove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s://killerconatx.com/awards/</text:p>
          </table:table-cell>
          <table:table-cell office:value-type="string" calcext:value-type="string">
            <text:p>Horror &amp; Dark Fiction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not_checked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splatterpunk_novella</text:p>
          </table:table-cell>
          <table:table-cell office:value-type="string" calcext:value-type="string">
            <text:p>Splatterpunk - Novella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s://killerconatx.com/awards/</text:p>
          </table:table-cell>
          <table:table-cell office:value-type="string" calcext:value-type="string">
            <text:p>Horror &amp; Dark Fiction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not_checked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spsfc_novel_finalists</text:p>
          </table:table-cell>
          <table:table-cell office:value-type="string" calcext:value-type="string">
            <text:p>SPSFC - Novel Finalists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s://spsfc.space/2025/08/07/and-the-spsfc-4-winner-is/</text:p>
          </table:table-cell>
          <table:table-cell office:value-type="string" calcext:value-type="string">
            <text:p>Science Fiction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not_checked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stella_prize</text:p>
          </table:table-cell>
          <table:table-cell office:value-type="string" calcext:value-type="string">
            <text:p>Stella Priz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s://stella.org.au/past-prize-winners/</text:p>
          </table:table-cell>
          <table:table-cell office:value-type="string" calcext:value-type="string">
            <text:p>Literary &amp; General Fiction | Nonfiction | Regional &amp; National Awards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Automatic | Stella | Wikipedia</text:p>
          </table:table-cell>
          <table:table-cell office:value-type="string" calcext:value-type="string">
            <text:p>not_checked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strand_critics_award_debut_mystery</text:p>
          </table:table-cell>
          <table:table-cell office:value-type="string" calcext:value-type="string">
            <text:p>Strand Critics Award - Debut Mystery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s://www.librarything.com/award/1380/The-Strand-Critics-Award</text:p>
          </table:table-cell>
          <table:table-cell office:value-type="string" calcext:value-type="string">
            <text:p>Crime, Mystery &amp; Thriller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not_checked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strand_critics_award_mystery_novel</text:p>
          </table:table-cell>
          <table:table-cell office:value-type="string" calcext:value-type="string">
            <text:p>Strand Critics Award - Mystery Nove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s://www.librarything.com/award/1380/The-Strand-Critics-Award</text:p>
          </table:table-cell>
          <table:table-cell office:value-type="string" calcext:value-type="string">
            <text:p>Crime, Mystery &amp; Thriller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not_checked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word_and_laser_book_list</text:p>
          </table:table-cell>
          <table:table-cell office:value-type="string" calcext:value-type="string">
            <text:p>Sword and Laser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s://swordandlaser.fandom.com/wiki/Book_List</text:p>
          </table:table-cell>
          <table:table-cell office:value-type="string" calcext:value-type="string">
            <text:p>Online Community Book Clubs | Science Fiction | Fantasy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utomatic | Fandom API | Fandom wiki page | Fandom raw page | Fandom export</text:p>
          </table:table-cell>
          <table:table-cell office:value-type="string" calcext:value-type="string">
            <text:p>Checked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theakston_old_peculier_crime_novel_of_the_year</text:p>
          </table:table-cell>
          <table:table-cell office:value-type="string" calcext:value-type="string">
            <text:p>Theakston Old Peculier Crime Novel of the Year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s://www.librarything.com/award/2016/Theakston-Old-Peculier-Crime-Novel-of-the-Year</text:p>
          </table:table-cell>
          <table:table-cell office:value-type="string" calcext:value-type="string">
            <text:p>Crime, Mystery &amp; Thriller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Automatic | LibraryThing | Wikipedia</text:p>
          </table:table-cell>
          <table:table-cell office:value-type="string" calcext:value-type="string">
            <text:p>not_checked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this_is_horror_anthology</text:p>
          </table:table-cell>
          <table:table-cell office:value-type="string" calcext:value-type="string">
            <text:p>This Is Horror - Anthology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s://www.thisishorror.co.uk/awards/</text:p>
          </table:table-cell>
          <table:table-cell office:value-type="string" calcext:value-type="string">
            <text:p>Horror &amp; Dark Fiction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not_checked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this_is_horror_novel</text:p>
          </table:table-cell>
          <table:table-cell office:value-type="string" calcext:value-type="string">
            <text:p>This Is Horror - Nove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s://www.thisishorror.co.uk/awards/</text:p>
          </table:table-cell>
          <table:table-cell office:value-type="string" calcext:value-type="string">
            <text:p>Horror &amp; Dark Fiction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not_checked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this_is_horror_novella</text:p>
          </table:table-cell>
          <table:table-cell office:value-type="string" calcext:value-type="string">
            <text:p>This Is Horror - Novella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s://www.thisishorror.co.uk/awards/</text:p>
          </table:table-cell>
          <table:table-cell office:value-type="string" calcext:value-type="string">
            <text:p>Horror &amp; Dark Fiction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not_checked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this_is_horror_short_story_collection</text:p>
          </table:table-cell>
          <table:table-cell office:value-type="string" calcext:value-type="string">
            <text:p>This Is Horror - Short Story Collectio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s://www.thisishorror.co.uk/awards/</text:p>
          </table:table-cell>
          <table:table-cell office:value-type="string" calcext:value-type="string">
            <text:p>Horror &amp; Dark Fiction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not_checked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victorian_premiers_literary_awards_childrens_literature</text:p>
          </table:table-cell>
          <table:table-cell office:value-type="string" calcext:value-type="string">
            <text:p>Victorian Premier's Literary Awards - Children's Literatur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s://www.wheelercentre.com/victorian-premier-s-literary-awards/past-awards</text:p>
          </table:table-cell>
          <table:table-cell office:value-type="string" calcext:value-type="string">
            <text:p>Young Adult &amp; Children's Literature | Regional &amp; National Awards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not_checked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victorian_premiers_literary_awards_fiction</text:p>
          </table:table-cell>
          <table:table-cell office:value-type="string" calcext:value-type="string">
            <text:p>Victorian Premier's Literary Awards - Fictio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s://www.wheelercentre.com/victorian-premier-s-literary-awards/past-awards</text:p>
          </table:table-cell>
          <table:table-cell office:value-type="string" calcext:value-type="string">
            <text:p>Literary &amp; General Fiction | Regional &amp; National Awards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not_checked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victorian_premiers_literary_awards_indigenous_writing</text:p>
          </table:table-cell>
          <table:table-cell office:value-type="string" calcext:value-type="string">
            <text:p>Victorian Premier's Literary Awards - Indigenous Writi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s://www.wheelercentre.com/victorian-premier-s-literary-awards/past-awards</text:p>
          </table:table-cell>
          <table:table-cell office:value-type="string" calcext:value-type="string">
            <text:p>Regional &amp; National Awards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not_checked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victorian_premiers_literary_awards_nonfiction</text:p>
          </table:table-cell>
          <table:table-cell office:value-type="string" calcext:value-type="string">
            <text:p>Victorian Premier's Literary Awards - Non-fictio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s://www.wheelercentre.com/victorian-premier-s-literary-awards/past-awards</text:p>
          </table:table-cell>
          <table:table-cell office:value-type="string" calcext:value-type="string">
            <text:p>Nonfiction | Regional &amp; National Awards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not_checked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victorian_premiers_literary_awards_writing_for_young_adults</text:p>
          </table:table-cell>
          <table:table-cell office:value-type="string" calcext:value-type="string">
            <text:p>Victorian Premier's Literary Awards - Writing for Young Adults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s://www.wheelercentre.com/victorian-premier-s-literary-awards/past-awards</text:p>
          </table:table-cell>
          <table:table-cell office:value-type="string" calcext:value-type="string">
            <text:p>Young Adult &amp; Children's Literature | Regional &amp; National Awards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not_checked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walter_scott_prize</text:p>
          </table:table-cell>
          <table:table-cell office:value-type="string" calcext:value-type="string">
            <text:p>Walter Scott Priz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s://www.walterscottprize.co.uk/wp-content/uploads/2025/08/PREVIOUS-WINNERS-OF-THE-WALTER-SCOTT-PRIZE-FOR-HISTORICAL-FICTION.pdf</text:p>
          </table:table-cell>
          <table:table-cell office:value-type="string" calcext:value-type="string">
            <text:p>Literary &amp; General Fiction | Regional &amp; National Awards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Automatic | Walter Scott | Wikipedia</text:p>
          </table:table-cell>
          <table:table-cell office:value-type="string" calcext:value-type="string">
            <text:p>not_checked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western_australian_premiers_book_awards_book_of_the_year</text:p>
          </table:table-cell>
          <table:table-cell office:value-type="string" calcext:value-type="string">
            <text:p>Western Australian Premier's Book Awards - Book of the Year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s://en.wikipedia.org/wiki/Western_Australian_Premier%27s_Book_Awards</text:p>
          </table:table-cell>
          <table:table-cell office:value-type="string" calcext:value-type="string">
            <text:p>Regional &amp; National Awards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not_checked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western_australian_premiers_book_awards_childrens</text:p>
          </table:table-cell>
          <table:table-cell office:value-type="string" calcext:value-type="string">
            <text:p>Western Australian Premier's Book Awards - Children's Book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s://en.wikipedia.org/wiki/Western_Australian_Premier%27s_Book_Awards</text:p>
          </table:table-cell>
          <table:table-cell office:value-type="string" calcext:value-type="string">
            <text:p>Young Adult &amp; Children's Literature | Regional &amp; National Awards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not_checked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western_australian_premiers_book_awards_emerging_writer</text:p>
          </table:table-cell>
          <table:table-cell office:value-type="string" calcext:value-type="string">
            <text:p>Western Australian Premier's Book Awards - Emerging Writer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s://en.wikipedia.org/wiki/Western_Australian_Premier%27s_Book_Awards</text:p>
          </table:table-cell>
          <table:table-cell office:value-type="string" calcext:value-type="string">
            <text:p>Regional &amp; National Awards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not_checked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western_australian_premiers_book_awards_fiction</text:p>
          </table:table-cell>
          <table:table-cell office:value-type="string" calcext:value-type="string">
            <text:p>Western Australian Premier's Book Awards - Fictio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s://en.wikipedia.org/wiki/Western_Australian_Premier%27s_Book_Awards</text:p>
          </table:table-cell>
          <table:table-cell office:value-type="string" calcext:value-type="string">
            <text:p>Literary &amp; General Fiction | Regional &amp; National Awards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not_checked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western_australian_premiers_book_awards_nonfiction</text:p>
          </table:table-cell>
          <table:table-cell office:value-type="string" calcext:value-type="string">
            <text:p>Western Australian Premier's Book Awards - Nonfictio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s://en.wikipedia.org/wiki/Western_Australian_Premier%27s_Book_Awards</text:p>
          </table:table-cell>
          <table:table-cell office:value-type="string" calcext:value-type="string">
            <text:p>Nonfiction | Regional &amp; National Awards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not_checked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western_australian_premiers_book_awards_young_adult</text:p>
          </table:table-cell>
          <table:table-cell office:value-type="string" calcext:value-type="string">
            <text:p>Western Australian Premier's Book Awards - Young Adult Book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s://en.wikipedia.org/wiki/Western_Australian_Premier%27s_Book_Awards</text:p>
          </table:table-cell>
          <table:table-cell office:value-type="string" calcext:value-type="string">
            <text:p>Young Adult &amp; Children's Literature | Regional &amp; National Awards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not_checked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william_c_morris_award</text:p>
          </table:table-cell>
          <table:table-cell office:value-type="string" calcext:value-type="string">
            <text:p>William C. Morris YA Debut Awar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s://www.ala.org/yalsa/booklistsawards/bookawards/morris/previous</text:p>
          </table:table-cell>
          <table:table-cell office:value-type="string" calcext:value-type="string">
            <text:p>Young Adult &amp; Children's Literature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not_checked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womens_prize_fiction</text:p>
          </table:table-cell>
          <table:table-cell office:value-type="string" calcext:value-type="string">
            <text:p>Women's Prize for Fictio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s://womensprize.com/prizes/womens-prize-for-fiction/</text:p>
          </table:table-cell>
          <table:table-cell office:value-type="string" calcext:value-type="string">
            <text:p>Literary &amp; General Fiction | Regional &amp; National Awards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Automatic | Official Women's Prize | Wikipedia</text:p>
          </table:table-cell>
          <table:table-cell office:value-type="string" calcext:value-type="string">
            <text:p>not_checked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womens_prize_nonfiction</text:p>
          </table:table-cell>
          <table:table-cell office:value-type="string" calcext:value-type="string">
            <text:p>Women's Prize for Non-Fictio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s://womensprize.com/prizes/womens-prize-for-non-fiction/</text:p>
          </table:table-cell>
          <table:table-cell office:value-type="string" calcext:value-type="string">
            <text:p>Nonfiction | Regional &amp; National Awards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Automatic | Official Women's Prize | Wikipedia</text:p>
          </table:table-cell>
          <table:table-cell office:value-type="string" calcext:value-type="string">
            <text:p>not_checked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world_fantasy_anthology</text:p>
          </table:table-cell>
          <table:table-cell office:value-type="string" calcext:value-type="string">
            <text:p>World Fantasy - Anthology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s://www.sfadb.com/World_Fantasy_Awards</text:p>
          </table:table-cell>
          <table:table-cell office:value-type="string" calcext:value-type="string">
            <text:p>Fantasy | Horror &amp; Dark Fiction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Automatic | SFADB | ISFDB</text:p>
          </table:table-cell>
          <table:table-cell office:value-type="string" calcext:value-type="string">
            <text:p>not_checked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world_fantasy_collection</text:p>
          </table:table-cell>
          <table:table-cell office:value-type="string" calcext:value-type="string">
            <text:p>World Fantasy - Collectio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s://www.sfadb.com/World_Fantasy_Awards</text:p>
          </table:table-cell>
          <table:table-cell office:value-type="string" calcext:value-type="string">
            <text:p>Fantasy | Horror &amp; Dark Fiction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Automatic | SFADB | ISFDB</text:p>
          </table:table-cell>
          <table:table-cell office:value-type="string" calcext:value-type="string">
            <text:p>not_checked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world_fantasy_collection_anthology</text:p>
          </table:table-cell>
          <table:table-cell office:value-type="string" calcext:value-type="string">
            <text:p>World Fantasy - Collection/Anthology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s://www.sfadb.com/World_Fantasy_Awards</text:p>
          </table:table-cell>
          <table:table-cell office:value-type="string" calcext:value-type="string">
            <text:p>Fantasy | Horror &amp; Dark Fiction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Automatic | SFADB | ISFDB</text:p>
          </table:table-cell>
          <table:table-cell office:value-type="string" calcext:value-type="string">
            <text:p>not_checked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world_fantasy_novel</text:p>
          </table:table-cell>
          <table:table-cell office:value-type="string" calcext:value-type="string">
            <text:p>World Fantasy - Nove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s://www.sfadb.com/World_Fantasy_Awards</text:p>
          </table:table-cell>
          <table:table-cell office:value-type="string" calcext:value-type="string">
            <text:p>Fantasy | Horror &amp; Dark Fiction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Automatic | SFADB | ISFDB</text:p>
          </table:table-cell>
          <table:table-cell office:value-type="string" calcext:value-type="string">
            <text:p>not_checked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world_fantasy_novella</text:p>
          </table:table-cell>
          <table:table-cell office:value-type="string" calcext:value-type="string">
            <text:p>World Fantasy - Novella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s://www.sfadb.com/World_Fantasy_Awards</text:p>
          </table:table-cell>
          <table:table-cell office:value-type="string" calcext:value-type="string">
            <text:p>Fantasy | Horror &amp; Dark Fiction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Automatic | SFADB | ISFDB</text:p>
          </table:table-cell>
          <table:table-cell office:value-type="string" calcext:value-type="string">
            <text:p>not_checked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writers_trust_atwood_gibson_fiction</text:p>
          </table:table-cell>
          <table:table-cell office:value-type="string" calcext:value-type="string">
            <text:p>Writers' Trust - Atwood Gibson Fiction Priz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s://www.writerstrust.com/writers-books/awards/atwood-gibson-writers-trust-fiction-prize</text:p>
          </table:table-cell>
          <table:table-cell office:value-type="string" calcext:value-type="string">
            <text:p>Literary &amp; General Fiction | Regional &amp; National Awards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not_checked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writers_trust_balsillie_public_policy</text:p>
          </table:table-cell>
          <table:table-cell office:value-type="string" calcext:value-type="string">
            <text:p>Writers' Trust - Balsillie Prize for Public Policy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s://www.writerstrust.com/writers-books/awards/balsillie-prize-for-public-policy</text:p>
          </table:table-cell>
          <table:table-cell office:value-type="string" calcext:value-type="string">
            <text:p>Nonfiction | Regional &amp; National Awards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not_checked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writers_trust_hilary_weston_nonfiction</text:p>
          </table:table-cell>
          <table:table-cell office:value-type="string" calcext:value-type="string">
            <text:p>Writers' Trust - Hilary Weston Nonfiction Priz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s://www.writerstrust.com/writers-books/awards/hilary-weston-writers-trust-prize-for-nonfiction</text:p>
          </table:table-cell>
          <table:table-cell office:value-type="string" calcext:value-type="string">
            <text:p>Nonfiction | Regional &amp; National Awards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not_checked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writers_trust_shaughnessy_cohen_political_writing</text:p>
          </table:table-cell>
          <table:table-cell office:value-type="string" calcext:value-type="string">
            <text:p>Writers' Trust - Shaughnessy Cohen Political Writing Priz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s://www.writerstrust.com/writers-books/awards/shaughnessy-cohen-prize-for-political-writing</text:p>
          </table:table-cell>
          <table:table-cell office:value-type="string" calcext:value-type="string">
            <text:p>Nonfiction | Regional &amp; National Awards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not_checked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yalsa_excellence_nonfiction_young_adults</text:p>
          </table:table-cell>
          <table:table-cell office:value-type="string" calcext:value-type="string">
            <text:p>YALSA Award for Excellence in Nonfiction for Young Adults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s://www.ala.org/yalsa/booklistsawards/bookawards/nonfiction/previous</text:p>
          </table:table-cell>
          <table:table-cell office:value-type="string" calcext:value-type="string">
            <text:p>Young Adult &amp; Children's Literature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not_checked</text:p>
          </table:table-cell>
        </table:table-row>
        <calcext:conditional-formats>
          <calcext:conditional-format calcext:target-range-address="import_list_catalog.A2:import_list_catalog.M397">
            <calcext:condition calcext:apply-style-name="Good" calcext:value="formula-is([.$M2]=&quot;Checked&quot;)" calcext:base-cell-address="import_list_catalog.A2"/>
          </calcext:conditional-format>
        </calcext:conditional-formats>
      </table:table>
      <table:named-expressions/>
      <table:database-ranges>
        <table:database-range table:name="__Anonymous_Sheet_DB__0" table:target-range-address="import_list_catalog.A1:import_list_catalog.M397" table:display-filter-buttons="tru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CA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15">0000-00-00</text:date>, <text:time style:data-style-name="N2" text:time-value="00:17:00.6119292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date>2026-07-15T01:12:08.910298500</dc:date>
    <meta:editing-duration>PT1H13M53S</meta:editing-duration>
    <meta:editing-cycles>2</meta:editing-cycles>
    <meta:generator>LibreOffice/26.2.4.2$Windows_X86_64 LibreOffice_project/0229ac93fcf0d7cbc6376066c6f35021cef002dc</meta:generator>
    <meta:document-statistic meta:table-count="1" meta:cell-count="5161" meta:object-count="0"/>
  </office:meta>
</office:document-meta>
</file>